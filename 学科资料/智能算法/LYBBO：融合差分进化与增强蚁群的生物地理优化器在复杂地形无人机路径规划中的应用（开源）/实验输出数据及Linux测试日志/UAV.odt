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lin_eclipse/anaconda3/envs/metaevobox_env/bin/python /home/lin_eclipse/PycharmProjects/PythonProject/MetaevoBox_EACO/test_eaco.py </text:p>
      <text:p text:style-name="Standard">2025-06-03 03:30:54,487<text:tab/>INFO worker.py:1852 -- Started a local Ray instance.</text:p>
      <text:p text:style-name="Standard">Detected UAV Problem.</text:p>
      <text:p text:style-name="Standard">UAV dataset is ready in: /home/lin_eclipse/PycharmProjects/PythonProject/MetaevoBox_EACO/metabox_data/uav</text:p>
      <text:p text:style-name="Standard">None of learnable agent</text:p>
      <text:p text:style-name="Standard">there are 6 traditional optimizer</text:p>
      <text:p text:style-name="Standard">t_optimizer:BBO_EACO</text:p>
      <text:p text:style-name="Standard">t_optimizer:DE</text:p>
      <text:p text:style-name="Standard">t_optimizer:PSO</text:p>
      <text:p text:style-name="Standard">t_optimizer:SHADE</text:p>
      <text:p text:style-name="Standard">t_optimizer:CMAES</text:p>
      <text:p text:style-name="Standard">t_optimizer:Random_search</text:p>
      <text:p text:style-name="Standard">Batch Testing Optimizer BBO_EACO with Problem Batch 0, Run 0: <text:s text:c="2"/>0%| <text:s text:c="9"/>| 0/1680 [00:00&lt;?, ?it/s]start testing: 20250603T033056_uav_difficult</text:p>
      <text:p text:style-name="Standard">following config:</text:p>
      <text:p text:style-name="Standard">{'Cr': 0.5,</text:p>
      <text:p text:style-name="Standard"><text:s/>'F': 0.5,</text:p>
      <text:p text:style-name="Standard"><text:s/>'NP': 50,</text:p>
      <text:p text:style-name="Standard"><text:s/>'agent_save_dir': 'agent_model/train/',</text:p>
      <text:p text:style-name="Standard"><text:s/>'baselines': {'bbo': ['BBO_EACO',</text:p>
      <text:p text:style-name="Standard"><text:s text:c="23"/>'DE',</text:p>
      <text:p text:style-name="Standard"><text:s text:c="23"/>'PSO',</text:p>
      <text:p text:style-name="Standard"><text:s text:c="23"/>'SHADE',</text:p>
      <text:p text:style-name="Standard"><text:s text:c="23"/>'CMAES',</text:p>
      <text:p text:style-name="Standard"><text:s text:c="23"/>'Random_search'],</text:p>
      <text:p text:style-name="Standard"><text:s text:c="15"/>'metabbo': []},</text:p>
      <text:p text:style-name="Standard"><text:s/>'device': 'cpu',</text:p>
      <text:p text:style-name="Standard"><text:s/>'dim': 30,</text:p>
      <text:p text:style-name="Standard"><text:s/>'end_mode': 'epoch',</text:p>
      <text:p text:style-name="Standard"><text:s/>'full_meta_data': True,</text:p>
      <text:p text:style-name="Standard"><text:s/>'log_dir': 'output/',</text:p>
      <text:p text:style-name="Standard"><text:s/>'log_interval': 50,</text:p>
      <text:p text:style-name="Standard"><text:s/>'maxFEs': 2500,</text:p>
      <text:p text:style-name="Standard"><text:s/>'max_epoch': 100,</text:p>
      <text:p text:style-name="Standard"><text:s/>'max_learning_step': 1000000000.0,</text:p>
      <text:p text:style-name="Standard"><text:s/>'mgd_test_log_dir': 'output/mgd_test/20250603T033056',</text:p>
      <text:p text:style-name="Standard"><text:s/>'mte_test_log_dir': 'output/mte_test/20250603T033056',</text:p>
      <text:p text:style-name="Standard"><text:s/>'n_checkpoint': 20,</text:p>
      <text:p text:style-name="Standard"><text:s/>'n_logpoint': 50,</text:p>
      <text:p text:style-name="Standard"><text:s/>'no_tb': False,</text:p>
      <text:p text:style-name="Standard"><text:s/>'phi1': 2.0,</text:p>
      <text:p text:style-name="Standard"><text:s/>'phi2': 2.0,</text:p>
      <text:p text:style-name="Standard"><text:s/>'population_size': 50,</text:p>
      <text:p text:style-name="Standard"><text:s/>'rollout_log_dir': 'output/rollout/20250603T033056',</text:p>
      <text:p text:style-name="Standard"><text:s/>'rollout_run': 10,</text:p>
      <text:p text:style-name="Standard"><text:s/>'run_time': '20250603T033056',</text:p>
      <text:p text:style-name="Standard"><text:s/>'save_interval': 5,</text:p>
      <text:p text:style-name="Standard"><text:soft-page-break/><text:s/>'seed': 3849,</text:p>
      <text:p text:style-name="Standard"><text:s/>'test_batch_size': 4,</text:p>
      <text:p text:style-name="Standard"><text:s/>'test_difficulty': 'difficult',</text:p>
      <text:p text:style-name="Standard"><text:s/>'test_log_dir': 'output/test/20250603T033056_uav_difficult',</text:p>
      <text:p text:style-name="Standard"><text:s/>'test_parallel_mode': 'Serial',</text:p>
      <text:p text:style-name="Standard"><text:s/>'test_problem': 'uav',</text:p>
      <text:p text:style-name="Standard"><text:s/>'test_run': 20,</text:p>
      <text:p text:style-name="Standard"><text:s/>'train_batch_size': 1,</text:p>
      <text:p text:style-name="Standard"><text:s/>'train_difficulty': 'easy',</text:p>
      <text:p text:style-name="Standard"><text:s/>'train_mode': 'single',</text:p>
      <text:p text:style-name="Standard"><text:s/>'train_name': '20250603T033056_bbob-10D_easy',</text:p>
      <text:p text:style-name="Standard"><text:s/>'train_parallel_mode': 'subproc',</text:p>
      <text:p text:style-name="Standard"><text:s/>'train_problem': 'bbob-10D',</text:p>
      <text:p text:style-name="Standard"><text:s/>'uav_path': '/home/lin_eclipse/PycharmProjects/PythonProject/MetaevoBox_EACO/metabox_data/uav/Model56.pkl',</text:p>
      <text:p text:style-name="Standard"><text:s/>'upperbound': 5,</text:p>
      <text:p text:style-name="Standard"><text:s/>'user_test_problem_list': None,</text:p>
      <text:p text:style-name="Standard"><text:s/>'user_train_problem_list': None}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DE with Problem Batch 0, Run 1: <text:s/>17%|█▋ <text:s text:c="7"/>| 281/1680 [1:49:17&lt;9:29:35, 24.43s/it]/home/lin_eclipse/anaconda3/envs/metaevobox_env/lib/python3.11/site-packages/deap/creator.py:185: RuntimeWarning: A class named 'Fitnessmin' has already been created and it will be overwritten. Consider deleting previous creation of that class or rename it.</text:p>
      <text:p text:style-name="Standard"><text:s text:c="2"/>warnings.warn("A class named '{0}' has already been created and it "</text:p>
      <text:p text:style-name="Standard">/home/lin_eclipse/anaconda3/envs/metaevobox_env/lib/python3.11/site-packages/deap/creator.py:185: RuntimeWarning: A class named 'Individual' has already been created and it will be overwritten. Consider deleting previous creation of that class or rename it.</text:p>
      <text:p text:style-name="Standard"><text:s text:c="2"/>warnings.warn("A class named '{0}' has already been created and it "</text:p>
      <text:p text:style-name="Standard">Batch Testing Optimizer PSO with Problem Batch 0, Run 1: <text:s/>33%|███▎ <text:s text:c="5"/>| 561/1680 [3:43:47&lt;9:03:44, 29.16s/it]/home/lin_eclipse/anaconda3/envs/metaevobox_env/lib/python3.11/site-packages/deap/creator.py:185: RuntimeWarning: A class named 'Particle' has already been created and it will be overwritten. Consider deleting previous creation of that class or rename it.</text:p>
      <text:p text:style-name="Standard"><text:s text:c="2"/>warnings.warn("A class named '{0}' has already been created and it "</text:p>
      <text:p text:style-name="Standard">Batch Testing Optimizer CMAES with Problem Batch 0, Run 0: <text:s/>67%|██████▋ <text:s text:c="2"/>| 1120/1680 [7:34:12&lt;3:34:55, 23.03s/it] <text:s/>(25_w,50)-aCMA-ES (mu_w=14.0,w_1=14%) in dimension 30 (seed=1031711, Tue Jun <text:s/>3 11:05:1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1: <text:s/>67%|██████▋ <text:s text:c="2"/>| 1121/1680 [7:34:13&lt;2:32:59, 16.42s/it](25_w,50)-aCMA-ES (mu_w=14.0,w_1=14%) in dimension 30 (seed=1043383, Tue Jun <text:s/>3 11:05:1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0, Run 2: <text:s/>67%|██████▋ <text:s text:c="2"/>| 1122/1680 [7:34:14&lt;1:49:33, 11.78s/it](25_w,50)-aCMA-ES (mu_w=14.0,w_1=14%) in dimension 30 (seed=966852, Tue Jun <text:s/>3 11:05:1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3: <text:s/>67%|██████▋ <text:s text:c="2"/>| 1123/1680 [7:34:15&lt;1:19:09, <text:s/>8.53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46372, Tue Jun <text:s/>3 11:05:13 2025)</text:p>
      <text:p text:style-name="Standard">(25_w,50)-aCMA-ES (mu_w=14.0,w_1=14%) in dimension 30 (seed=970443, Tue Jun <text:s/>3 11:05:14 2025)</text:p>
      <text:p text:style-name="Standard">Batch Testing Optimizer CMAES with Problem Batch 0, Run 4: <text:s/>67%|██████▋ <text:s text:c="2"/>| 1124/1680 [7:34:17&lt;58:43, <text:s/>6.34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5: <text:s/>67%|██████▋ <text:s text:c="2"/>| 1125/1680 [7:34:18&lt;45:28, <text:s/>4.92s/it](25_w,50)-aCMA-ES (mu_w=14.0,w_1=14%) in dimension 30 (seed=929844, Tue Jun <text:s/>3 11:05:1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6: <text:s/>67%|██████▋ <text:s text:c="2"/>| 1126/1680 [7:34:20&lt;37:05, <text:s/>4.02s/it](25_w,50)-aCMA-ES (mu_w=14.0,w_1=14%) in dimension 30 (seed=1099325, Tue Jun <text:s/>3 11:05:1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7: <text:s/>67%|██████▋ <text:s text:c="2"/>| 1127/1680 [7:34:22&lt;32:21, <text:s/>3.51s/it](25_w,50)-aCMA-ES (mu_w=14.0,w_1=14%) in dimension 30 (seed=1031954, Tue Jun <text:s/>3 11:05:2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8: <text:s/>67%|██████▋ <text:s text:c="2"/>| 1128/1680 [7:34:25&lt;29:26, <text:s/>3.20s/it](25_w,50)-aCMA-ES (mu_w=14.0,w_1=14%) in dimension 30 (seed=1011523, Tue Jun <text:s/>3 11:05:22 2025)</text:p>
      <text:p text:style-name="Standard">Batch Testing Optimizer CMAES with Problem Batch 0, Run 9: <text:s/>67%|██████▋ <text:s text:c="2"/>| 1129/1680 [7:34:27&lt;26:32, <text:s/>2.89s/it](25_w,50)-aCMA-ES (mu_w=14.0,w_1=14%) in dimension 30 (seed=1037475, Tue Jun <text:s/>3 11:05:2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0, Run 10: <text:s/>67%|██████▋ <text:s text:c="2"/>| 1130/1680 [7:34:29&lt;22:58, <text:s/>2.51s/it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70679, Tue Jun <text:s/>3 11:05:26 2025)</text:p>
      <text:p text:style-name="Standard"><text:s text:c="2"/>np.abs(np.cross((b - a), (x - a), axis = 0)) / d_ab, <text:s/># Perpendicular distance</text:p>
      <text:p text:style-name="Standard">Batch Testing Optimizer CMAES with Problem Batch 0, Run 11: <text:s/>67%|██████▋ <text:s text:c="2"/>| 1131/1680 [7:34:30&lt;20:26, <text:s/>2.23s/it](25_w,50)-aCMA-ES (mu_w=14.0,w_1=14%) in dimension 30 (seed=972435, Tue Jun <text:s/>3 11:05:2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12: <text:s/>67%|██████▋ <text:s text:c="2"/>| 1132/1680 [7:34:32&lt;18:38, <text:s/>2.04s/it](25_w,50)-aCMA-ES (mu_w=14.0,w_1=14%) in dimension 30 (seed=1072428, Tue Jun <text:s/>3 11:05:2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13: <text:s/>67%|██████▋ <text:s text:c="2"/>| 1133/1680 [7:34:34&lt;17:29, <text:s/>1.92s/it](25_w,50)-aCMA-ES (mu_w=14.0,w_1=14%) in dimension 30 (seed=968776, Tue Jun <text:s/>3 11:05:3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14: <text:s/>68%|██████▊ <text:s text:c="2"/>| 1134/1680 [7:34:35&lt;16:33, <text:s/>1.82s/it](25_w,50)-aCMA-ES (mu_w=14.0,w_1=14%) in dimension 30 (seed=1069489, Tue Jun <text:s/>3 11:05:3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21130, Tue Jun <text:s/>3 11:05:34 2025)</text:p>
      <text:p text:style-name="Standard">Batch Testing Optimizer CMAES with Problem Batch 0, Run 16: <text:s/>68%|██████▊ <text:s text:c="2"/>| 1136/1680 [7:34:38&lt;15:25, <text:s/>1.70s/it](25_w,50)-aCMA-ES (mu_w=14.0,w_1=14%) in dimension 30 (seed=1011283, Tue Jun <text:s/>3 11:05:3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17: <text:s/>68%|██████▊ <text:s text:c="2"/>| 1137/1680 [7:34:40&lt;15:06, <text:s/>1.67s/it](25_w,50)-aCMA-ES (mu_w=14.0,w_1=14%) in dimension 30 (seed=1044302, Tue Jun <text:s/>3 11:05:37 2025)</text:p>
      <text:p text:style-name="Standard">Batch Testing Optimizer CMAES with Problem Batch 0, Run 18: <text:s/>68%|██████▊ <text:s text:c="2"/>| 1138/1680 [7:34:41&lt;14:54, <text:s/>1.65s/it](25_w,50)-aCMA-ES (mu_w=14.0,w_1=14%) in dimension 30 (seed=976085, Tue Jun <text:s/>3 11:05:39 2025)</text:p>
      <text:p text:style-name="Standard"><text:soft-page-break/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0, Run 19: <text:s/>68%|██████▊ <text:s text:c="2"/>| 1139/1680 [7:34:43&lt;14:39, <text:s/>1.63s/it](25_w,50)-aCMA-ES (mu_w=14.0,w_1=14%) in dimension 30 (seed=1078769, Tue Jun <text:s/>3 11:05:4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0: <text:s/>68%|██████▊ <text:s text:c="2"/>| 1140/1680 [7:34:44&lt;12:38, <text:s/>1.40s/it] (25_w,50)-aCMA-ES (mu_w=14.0,w_1=14%) in dimension 30 (seed=1024817, Tue Jun <text:s/>3 11:05:4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1: <text:s/>68%|██████▊ <text:s text:c="2"/>| 1141/1680 [7:34:45&lt;11:08, <text:s/>1.24s/it](25_w,50)-aCMA-ES (mu_w=14.0,w_1=14%) in dimension 30 (seed=1062230, Tue Jun <text:s/>3 11:05:4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2: <text:s/>68%|██████▊ <text:s text:c="2"/>| 1142/1680 [7:34:46&lt;10:01, <text:s/>1.12s/it](25_w,50)-aCMA-ES (mu_w=14.0,w_1=14%) in dimension 30 (seed=1062263, Tue Jun <text:s/>3 11:05:4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3: <text:s/>68%|██████▊ <text:s text:c="2"/>| 1143/1680 [7:34:46&lt;09:14, <text:s/>1.03s/it](25_w,50)-aCMA-ES (mu_w=14.0,w_1=14%) in dimension 30 (seed=989174, Tue Jun <text:s/>3 11:05:4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4: <text:s/>68%|██████▊ <text:s text:c="2"/>| 1144/1680 [7:34:47&lt;08:18, <text:s/>1.07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07024, Tue Jun <text:s/>3 11:05:45 2025)</text:p>
      <text:p text:style-name="Standard"><text:s text:c="2"/>np.abs(np.cross((b - a), (x - a), axis = 0)) / d_ab, <text:s/># Perpendicular distance</text:p>
      <text:p text:style-name="Standard">(25_w,50)-aCMA-ES (mu_w=14.0,w_1=14%) in dimension 30 (seed=1032076, Tue Jun <text:s/>3 11:05:45 2025)</text:p>
      <text:p text:style-name="Standard">Batch Testing Optimizer CMAES with Problem Batch 1, Run 5: <text:s/>68%|██████▊ <text:s text:c="2"/>| 1145/1680 [7:34:48&lt;07:34, <text:s/>1.18it/s]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(25_w,50)-aCMA-ES (mu_w=14.0,w_1=14%) in dimension 30 (seed=987256, Tue Jun <text:s/>3 11:05:46 2025)</text:p>
      <text:p text:style-name="Standard">Batch Testing Optimizer CMAES with Problem Batch 1, Run 6: <text:s/>68%|██████▊ <text:s text:c="2"/>| 1146/1680 [7:34:48&lt;07:02, <text:s/>1.27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7: <text:s/>68%|██████▊ <text:s text:c="2"/>| 1147/1680 [7:34:49&lt;07:06, <text:s/>1.25it/s](25_w,50)-aCMA-ES (mu_w=14.0,w_1=14%) in dimension 30 (seed=1033154, Tue Jun <text:s/>3 11:05:4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8: <text:s/>68%|██████▊ <text:s text:c="2"/>| 1148/1680 [7:34:51&lt;09:04, <text:s/>1.02s/it](25_w,50)-aCMA-ES (mu_w=14.0,w_1=14%) in dimension 30 (seed=995721, Tue Jun <text:s/>3 11:05:4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9: <text:s/>68%|██████▊ <text:s text:c="2"/>| 1149/1680 [7:34:52&lt;10:14, <text:s/>1.16s/it](25_w,50)-aCMA-ES (mu_w=14.0,w_1=14%) in dimension 30 (seed=979340, Tue Jun <text:s/>3 11:05:5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10: <text:s/>68%|██████▊ <text:s text:c="2"/>| 1150/1680 [7:34:53&lt;09:13, <text:s/>1.04s/it](25_w,50)-aCMA-ES (mu_w=14.0,w_1=14%) in dimension 30 (seed=1053258, Tue Jun <text:s/>3 11:05:5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42388, Tue Jun <text:s/>3 11:05:51 2025)</text:p>
      <text:p text:style-name="Standard">Batch Testing Optimizer CMAES with Problem Batch 1, Run 11: <text:s/>69%|██████▊ <text:s text:c="2"/>| 1151/1680 [7:34:54&lt;08:15, <text:s/>1.07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12: <text:s/>69%|██████▊ <text:s text:c="2"/>| 1152/1680 [7:34:54&lt;07:34, <text:s/>1.16it/s](25_w,50)-aCMA-ES (mu_w=14.0,w_1=14%) in dimension 30 (seed=1001404, Tue Jun <text:s/>3 11:05:5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1, Run 13: <text:s/>69%|██████▊ <text:s text:c="2"/>| 1153/1680 [7:34:55&lt;07:03, <text:s/>1.25it/s](25_w,50)-aCMA-ES (mu_w=14.0,w_1=14%) in dimension 30 (seed=933694, Tue Jun <text:s/>3 11:05:5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14: <text:s/>69%|██████▊ <text:s text:c="2"/>| 1154/1680 [7:34:56&lt;06:40, <text:s/>1.31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58097, Tue Jun <text:s/>3 11:05:53 2025)</text:p>
      <text:p text:style-name="Standard"><text:s text:c="2"/>np.abs(np.cross((b - a), (x - a), axis = 0)) / d_ab, <text:s/># Perpendicular distance</text:p>
      <text:p text:style-name="Standard">Batch Testing Optimizer CMAES with Problem Batch 1, Run 15: <text:s/>69%|██████▉ <text:s text:c="2"/>| 1155/1680 [7:34:56&lt;06:25, <text:s/>1.36it/s](25_w,50)-aCMA-ES (mu_w=14.0,w_1=14%) in dimension 30 (seed=1038126, Tue Jun <text:s/>3 11:05:5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16: <text:s/>69%|██████▉ <text:s text:c="2"/>| 1156/1680 [7:34:57&lt;06:13, <text:s/>1.40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962865, Tue Jun <text:s/>3 11:05:55 2025)</text:p>
      <text:p text:style-name="Standard"><text:s text:c="2"/>np.abs(np.cross((b - a), (x - a), axis = 0)) / d_ab, <text:s/># Perpendicular distance</text:p>
      <text:p text:style-name="Standard">Batch Testing Optimizer CMAES with Problem Batch 1, Run 17: <text:s/>69%|██████▉ <text:s text:c="2"/>| 1157/1680 [7:34:58&lt;06:05, <text:s/>1.43it/s](25_w,50)-aCMA-ES (mu_w=14.0,w_1=14%) in dimension 30 (seed=1027278, Tue Jun <text:s/>3 11:05:5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, Run 18: <text:s/>69%|██████▉ <text:s text:c="2"/>| 1158/1680 [7:34:58&lt;05:59, <text:s/>1.45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28633, Tue Jun <text:s/>3 11:05:56 2025)</text:p>
      <text:p text:style-name="Standard"><text:s text:c="2"/>np.abs(np.cross((b - a), (x - a), axis = 0)) / d_ab, <text:s/># Perpendicular distance</text:p>
      <text:p text:style-name="Standard">(25_w,50)-aCMA-ES (mu_w=14.0,w_1=14%) in dimension 30 (seed=1037597, Tue Jun <text:s/>3 11:05:56 2025)</text:p>
      <text:p text:style-name="Standard">Batch Testing Optimizer CMAES with Problem Batch 1, Run 19: <text:s/>69%|██████▉ <text:s text:c="2"/>| 1159/1680 [7:34:59&lt;05:54, <text:s/>1.47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2, Run 0: <text:s/>69%|██████▉ <text:s text:c="2"/>| 1160/1680 [7:35:00&lt;05:51, <text:s/>1.48it/s] (25_w,50)-aCMA-ES (mu_w=14.0,w_1=14%) in dimension 30 (seed=1009673, Tue Jun <text:s/>3 11:05:57 2025)</text:p>
      <text:p text:style-name="Standard"><text:soft-page-break/>Batch Testing Optimizer CMAES with Problem Batch 2, Run 1: <text:s/>69%|██████▉ <text:s text:c="2"/>| 1161/1680 [7:35:00&lt;05:49, <text:s/>1.48it/s](25_w,50)-aCMA-ES (mu_w=14.0,w_1=14%) in dimension 30 (seed=988051, Tue Jun <text:s/>3 11:05:5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2, Run 2: <text:s/>69%|██████▉ <text:s text:c="2"/>| 1162/1680 [7:35:01&lt;05:48, <text:s/>1.48it/s](25_w,50)-aCMA-ES (mu_w=14.0,w_1=14%) in dimension 30 (seed=998858, Tue Jun <text:s/>3 11:05:59 2025)</text:p>
      <text:p text:style-name="Standard">(25_w,50)-aCMA-ES (mu_w=14.0,w_1=14%) in dimension 30 (seed=1019818, Tue Jun <text:s/>3 11:05:59 2025)</text:p>
      <text:p text:style-name="Standard">Batch Testing Optimizer CMAES with Problem Batch 2, Run 4: <text:s/>69%|██████▉ <text:s text:c="2"/>| 1164/1680 [7:35:02&lt;05:45, <text:s/>1.49it/s](25_w,50)-aCMA-ES (mu_w=14.0,w_1=14%) in dimension 30 (seed=1000206, Tue Jun <text:s/>3 11:06:00 2025)</text:p>
      <text:p text:style-name="Standard">Batch Testing Optimizer CMAES with Problem Batch 2, Run 5: <text:s/>69%|██████▉ <text:s text:c="2"/>| 1165/1680 [7:35:03&lt;05:44, <text:s/>1.50it/s](25_w,50)-aCMA-ES (mu_w=14.0,w_1=14%) in dimension 30 (seed=979126, Tue Jun <text:s/>3 11:06:01 2025)</text:p>
      <text:p text:style-name="Standard">Batch Testing Optimizer CMAES with Problem Batch 2, Run 6: <text:s/>69%|██████▉ <text:s text:c="2"/>| 1166/1680 [7:35:04&lt;05:43, <text:s/>1.49it/s](25_w,50)-aCMA-ES (mu_w=14.0,w_1=14%) in dimension 30 (seed=1085890, Tue Jun <text:s/>3 11:06:01 2025)</text:p>
      <text:p text:style-name="Standard">Batch Testing Optimizer CMAES with Problem Batch 2, Run 7: <text:s/>69%|██████▉ <text:s text:c="2"/>| 1167/1680 [7:35:05&lt;06:34, <text:s/>1.30it/s](25_w,50)-aCMA-ES (mu_w=14.0,w_1=14%) in dimension 30 (seed=1066163, Tue Jun <text:s/>3 11:06:02 2025)</text:p>
      <text:p text:style-name="Standard">Batch Testing Optimizer CMAES with Problem Batch 2, Run 8: <text:s/>70%|██████▉ <text:s text:c="2"/>| 1168/1680 [7:35:06&lt;07:07, <text:s/>1.20it/s](25_w,50)-aCMA-ES (mu_w=14.0,w_1=14%) in dimension 30 (seed=995564, Tue Jun <text:s/>3 11:06:03 2025)</text:p>
      <text:p text:style-name="Standard">Batch Testing Optimizer CMAES with Problem Batch 2, Run 9: <text:s/>70%|██████▉ <text:s text:c="2"/>| 1169/1680 [7:35:07&lt;07:11, <text:s/>1.18it/s](25_w,50)-aCMA-ES (mu_w=14.0,w_1=14%) in dimension 30 (seed=1048347, Tue Jun <text:s/>3 11:06:04 2025)</text:p>
      <text:p text:style-name="Standard">Batch Testing Optimizer CMAES with Problem Batch 2, Run 10: <text:s/>70%|██████▉ <text:s text:c="2"/>| 1170/1680 [7:35:08&lt;07:13, <text:s/>1.18it/s](25_w,50)-aCMA-ES (mu_w=14.0,w_1=14%) in dimension 30 (seed=980627, Tue Jun <text:s/>3 11:06:05 2025)</text:p>
      <text:p text:style-name="Standard">Batch Testing Optimizer CMAES with Problem Batch 2, Run 11: <text:s/>70%|██████▉ <text:s text:c="2"/>| 1171/1680 [7:35:08&lt;06:51, <text:s/>1.24it/s](25_w,50)-aCMA-ES (mu_w=14.0,w_1=14%) in dimension 30 (seed=989152, Tue Jun <text:s/>3 11:06:06 2025)</text:p>
      <text:p text:style-name="Standard">Batch Testing Optimizer CMAES with Problem Batch 2, Run 12: <text:s/>70%|██████▉ <text:s text:c="2"/>| 1172/1680 [7:35:09&lt;06:32, <text:s/>1.29it/s](25_w,50)-aCMA-ES (mu_w=14.0,w_1=14%) in dimension 30 (seed=1005169, Tue Jun <text:s/>3 11:06:06 2025)</text:p>
      <text:p text:style-name="Standard">Batch Testing Optimizer CMAES with Problem Batch 2, Run 13: <text:s/>70%|██████▉ <text:s text:c="2"/>| 1173/1680 [7:35:10&lt;06:17, <text:s/>1.34it/s](25_w,50)-aCMA-ES (mu_w=14.0,w_1=14%) in dimension 30 (seed=1010981, Tue Jun <text:s/>3 11:06:07 2025)</text:p>
      <text:p text:style-name="Standard">Batch Testing Optimizer CMAES with Problem Batch 2, Run 14: <text:s/>70%|██████▉ <text:s text:c="2"/>| 1174/1680 [7:35:10&lt;06:05, <text:s/>1.38it/s](25_w,50)-aCMA-ES (mu_w=14.0,w_1=14%) in dimension 30 (seed=943630, Tue Jun <text:s/>3 11:06:08 2025)</text:p>
      <text:p text:style-name="Standard">(25_w,50)-aCMA-ES (mu_w=14.0,w_1=14%) in dimension 30 (seed=1019922, Tue Jun <text:s/>3 11:06:08 2025)</text:p>
      <text:p text:style-name="Standard">Batch Testing Optimizer CMAES with Problem Batch 2, Run 16: <text:s/>70%|███████ <text:s text:c="2"/>| 1176/1680 [7:35:12&lt;05:50, <text:s/>1.44it/s](25_w,50)-aCMA-ES (mu_w=14.0,w_1=14%) in dimension 30 (seed=986541, Tue Jun <text:s/>3 11:06:09 2025)</text:p>
      <text:p text:style-name="Standard"><text:soft-page-break/>Batch Testing Optimizer CMAES with Problem Batch 2, Run 17: <text:s/>70%|███████ <text:s text:c="2"/>| 1177/1680 [7:35:12&lt;05:45, <text:s/>1.45it/s](25_w,50)-aCMA-ES (mu_w=14.0,w_1=14%) in dimension 30 (seed=935559, Tue Jun <text:s/>3 11:06:10 2025)</text:p>
      <text:p text:style-name="Standard">Batch Testing Optimizer CMAES with Problem Batch 2, Run 18: <text:s/>70%|███████ <text:s text:c="2"/>| 1178/1680 [7:35:13&lt;05:42, <text:s/>1.47it/s](25_w,50)-aCMA-ES (mu_w=14.0,w_1=14%) in dimension 30 (seed=1019361, Tue Jun <text:s/>3 11:06:10 2025)</text:p>
      <text:p text:style-name="Standard">Batch Testing Optimizer CMAES with Problem Batch 2, Run 19: <text:s/>70%|███████ <text:s text:c="2"/>| 1179/1680 [7:35:14&lt;05:39, <text:s/>1.47it/s](25_w,50)-aCMA-ES (mu_w=14.0,w_1=14%) in dimension 30 (seed=1043264, Tue Jun <text:s/>3 11:06:11 2025)</text:p>
      <text:p text:style-name="Standard">Batch Testing Optimizer CMAES with Problem Batch 3, Run 0: <text:s/>70%|███████ <text:s text:c="2"/>| 1180/1680 [7:35:14&lt;05:37, <text:s/>1.48it/s] (25_w,50)-aCMA-ES (mu_w=14.0,w_1=14%) in dimension 30 (seed=949958, Tue Jun <text:s/>3 11:06:1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37496, Tue Jun <text:s/>3 11:06:12 2025)</text:p>
      <text:p text:style-name="Standard">Batch Testing Optimizer CMAES with Problem Batch 3, Run 2: <text:s/>70%|███████ <text:s text:c="2"/>| 1182/1680 [7:35:16&lt;05:34, <text:s/>1.49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35706, Tue Jun <text:s/>3 11:06:13 2025)</text:p>
      <text:p text:style-name="Standard"><text:s text:c="2"/>np.abs(np.cross((b - a), (x - a), axis = 0)) / d_ab, <text:s/># Perpendicular distance</text:p>
      <text:p text:style-name="Standard">Batch Testing Optimizer CMAES with Problem Batch 3, Run 3: <text:s/>70%|███████ <text:s text:c="2"/>| 1183/1680 [7:35:16&lt;05:33, <text:s/>1.49it/s](25_w,50)-aCMA-ES (mu_w=14.0,w_1=14%) in dimension 30 (seed=1002842, Tue Jun <text:s/>3 11:06:1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40201, Tue Jun <text:s/>3 11:06:14 2025)</text:p>
      <text:p text:style-name="Standard">Batch Testing Optimizer CMAES with Problem Batch 3, Run 4: <text:s/>70%|███████ <text:s text:c="2"/>| 1184/1680 [7:35:17&lt;05:31, <text:s/>1.50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3, Run 5: <text:s/>71%|███████ <text:s text:c="2"/>| 1185/1680 [7:35:18&lt;05:30, <text:s/>1.50it/s](25_w,50)-aCMA-ES (mu_w=14.0,w_1=14%) in dimension 30 (seed=986282, Tue Jun <text:s/>3 11:06:1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3, Run 6: <text:s/>71%|███████ <text:s text:c="2"/>| 1186/1680 [7:35:18&lt;05:29, <text:s/>1.50it/s](25_w,50)-aCMA-ES (mu_w=14.0,w_1=14%) in dimension 30 (seed=1012383, Tue Jun <text:s/>3 11:06:1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3, Run 7: <text:s/>71%|███████ <text:s text:c="2"/>| 1187/1680 [7:35:19&lt;05:30, <text:s/>1.49it/s](25_w,50)-aCMA-ES (mu_w=14.0,w_1=14%) in dimension 30 (seed=1042339, Tue Jun <text:s/>3 11:06:1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24124, Tue Jun <text:s/>3 11:06:18 2025)</text:p>
      <text:p text:style-name="Standard">Batch Testing Optimizer CMAES with Problem Batch 3, Run 8: <text:s/>71%|███████ <text:s text:c="2"/>| 1188/1680 [7:35:20&lt;07:01, <text:s/>1.17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3, Run 9: <text:s/>71%|███████ <text:s text:c="2"/>| 1189/1680 [7:35:22&lt;08:38, <text:s/>1.06s/it](25_w,50)-aCMA-ES (mu_w=14.0,w_1=14%) in dimension 30 (seed=1000756, Tue Jun <text:s/>3 11:06:1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96486, Tue Jun <text:s/>3 11:06:20 2025)</text:p>
      <text:p text:style-name="Standard">Batch Testing Optimizer CMAES with Problem Batch 3, Run 10: <text:s/>71%|███████ <text:s text:c="2"/>| 1190/1680 [7:35:23&lt;08:23, <text:s/>1.03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3, Run 11: <text:s/>71%|███████ <text:s text:c="2"/>| 1191/1680 [7:35:23&lt;07:35, <text:s/>1.07it/s](25_w,50)-aCMA-ES (mu_w=14.0,w_1=14%) in dimension 30 (seed=977295, Tue Jun <text:s/>3 11:06:2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28275, Tue Jun <text:s/>3 11:06:21 2025)</text:p>
      <text:p text:style-name="Standard">Batch Testing Optimizer CMAES with Problem Batch 3, Run 13: <text:s/>71%|███████ <text:s text:c="2"/>| 1193/1680 [7:35:25&lt;06:30, <text:s/>1.25it/s](25_w,50)-aCMA-ES (mu_w=14.0,w_1=14%) in dimension 30 (seed=1055480, Tue Jun <text:s/>3 11:06:2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3, Run 14: <text:s/>71%|███████ <text:s text:c="2"/>| 1194/1680 [7:35:25&lt;06:11, <text:s/>1.31it/s](25_w,50)-aCMA-ES (mu_w=14.0,w_1=14%) in dimension 30 (seed=1050568, Tue Jun <text:s/>3 11:06:2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3, Run 15: <text:s/>71%|███████ <text:s text:c="2"/>| 1195/1680 [7:35:26&lt;05:57, <text:s/>1.36it/s](25_w,50)-aCMA-ES (mu_w=14.0,w_1=14%) in dimension 30 (seed=1021362, Tue Jun <text:s/>3 11:06:24 2025)</text:p>
      <text:p text:style-name="Standard">(25_w,50)-aCMA-ES (mu_w=14.0,w_1=14%) in dimension 30 (seed=1029002, Tue Jun <text:s/>3 11:06:24 2025)</text:p>
      <text:p text:style-name="Standard">Batch Testing Optimizer CMAES with Problem Batch 3, Run 17: <text:s/>71%|███████▏ <text:s/>| 1197/1680 [7:35:27&lt;05:40, <text:s/>1.42it/s](25_w,50)-aCMA-ES (mu_w=14.0,w_1=14%) in dimension 30 (seed=975317, Tue Jun <text:s/>3 11:06:25 2025)</text:p>
      <text:p text:style-name="Standard">Batch Testing Optimizer CMAES with Problem Batch 3, Run 18: <text:s/>71%|███████▏ <text:s/>| 1198/1680 [7:35:28&lt;05:34, <text:s/>1.44it/s](25_w,50)-aCMA-ES (mu_w=14.0,w_1=14%) in dimension 30 (seed=957348, Tue Jun <text:s/>3 11:06:2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3, Run 19: <text:s/>71%|███████▏ <text:s/>| 1199/1680 [7:35:29&lt;05:29, <text:s/>1.46it/s](25_w,50)-aCMA-ES (mu_w=14.0,w_1=14%) in dimension 30 (seed=1027551, Tue Jun <text:s/>3 11:06:2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0: <text:s/>71%|███████▏ <text:s/>| 1200/1680 [7:35:30&lt;05:27, <text:s/>1.47it/s] (25_w,50)-aCMA-ES (mu_w=14.0,w_1=14%) in dimension 30 (seed=1047557, Tue Jun <text:s/>3 11:06:27 2025)</text:p>
      <text:p text:style-name="Standard">Batch Testing Optimizer CMAES with Problem Batch 4, Run 1: <text:s/>71%|███████▏ <text:s/>| 1201/1680 [7:35:30&lt;05:25, <text:s/>1.47it/s](25_w,50)-aCMA-ES (mu_w=14.0,w_1=14%) in dimension 30 (seed=993209, Tue Jun <text:s/>3 11:06:2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2: <text:s/>72%|███████▏ <text:s/>| 1202/1680 [7:35:31&lt;05:23, <text:s/>1.48it/s](25_w,50)-aCMA-ES (mu_w=14.0,w_1=14%) in dimension 30 (seed=995411, Tue Jun <text:s/>3 11:06:2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3: <text:s/>72%|███████▏ <text:s/>| 1203/1680 [7:35:32&lt;05:22, <text:s/>1.48it/s](25_w,50)-aCMA-ES (mu_w=14.0,w_1=14%) in dimension 30 (seed=1043822, Tue Jun <text:s/>3 11:06:2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4: <text:s/>72%|███████▏ <text:s/>| 1204/1680 [7:35:32&lt;05:20, <text:s/>1.49it/s](25_w,50)-aCMA-ES (mu_w=14.0,w_1=14%) in dimension 30 (seed=936816, Tue Jun <text:s/>3 11:06:3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4, Run 5: <text:s/>72%|███████▏ <text:s/>| 1205/1680 [7:35:33&lt;05:18, <text:s/>1.49it/s](25_w,50)-aCMA-ES (mu_w=14.0,w_1=14%) in dimension 30 (seed=995856, Tue Jun <text:s/>3 11:06:3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6: <text:s/>72%|███████▏ <text:s/>| 1206/1680 [7:35:34&lt;05:17, <text:s/>1.49it/s](25_w,50)-aCMA-ES (mu_w=14.0,w_1=14%) in dimension 30 (seed=1001496, Tue Jun <text:s/>3 11:06:31 2025)</text:p>
      <text:p text:style-name="Standard">Batch Testing Optimizer CMAES with Problem Batch 4, Run 7: <text:s/>72%|███████▏ <text:s/>| 1207/1680 [7:35:34&lt;05:48, <text:s/>1.36it/s](25_w,50)-aCMA-ES (mu_w=14.0,w_1=14%) in dimension 30 (seed=1040306, Tue Jun <text:s/>3 11:06:3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8: <text:s/>72%|███████▏ <text:s/>| 1208/1680 [7:35:36&lt;07:53, <text:s/>1.00s/it](25_w,50)-aCMA-ES (mu_w=14.0,w_1=14%) in dimension 30 (seed=1029776, Tue Jun <text:s/>3 11:06:3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9: <text:s/>72%|███████▏ <text:s/>| 1209/1680 [7:35:37&lt;08:28, <text:s/>1.08s/it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02841, Tue Jun <text:s/>3 11:06:35 2025)</text:p>
      <text:p text:style-name="Standard"><text:s text:c="2"/>np.abs(np.cross((b - a), (x - a), axis = 0)) / d_ab, <text:s/># Perpendicular distance</text:p>
      <text:p text:style-name="Standard">(25_w,50)-aCMA-ES (mu_w=14.0,w_1=14%) in dimension 30 (seed=1048542, Tue Jun <text:s/>3 11:06:35 2025)</text:p>
      <text:p text:style-name="Standard">Batch Testing Optimizer CMAES with Problem Batch 4, Run 10: <text:s/>72%|███████▏ <text:s/>| 1210/1680 [7:35:38&lt;07:50, <text:s/>1.00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11: <text:s/>72%|███████▏ <text:s/>| 1211/1680 [7:35:39&lt;07:32, <text:s/>1.04it/s](25_w,50)-aCMA-ES (mu_w=14.0,w_1=14%) in dimension 30 (seed=1105991, Tue Jun <text:s/>3 11:06:3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12: <text:s/>72%|███████▏ <text:s/>| 1212/1680 [7:35:40&lt;07:02, <text:s/>1.11it/s](25_w,50)-aCMA-ES (mu_w=14.0,w_1=14%) in dimension 30 (seed=1012100, Tue Jun <text:s/>3 11:06:3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4, Run 13: <text:s/>72%|███████▏ <text:s/>| 1213/1680 [7:35:40&lt;06:38, <text:s/>1.17it/s](25_w,50)-aCMA-ES (mu_w=14.0,w_1=14%) in dimension 30 (seed=1053283, Tue Jun <text:s/>3 11:06:3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14: <text:s/>72%|███████▏ <text:s/>| 1214/1680 [7:35:41&lt;06:12, <text:s/>1.25it/s](25_w,50)-aCMA-ES (mu_w=14.0,w_1=14%) in dimension 30 (seed=1017286, Tue Jun <text:s/>3 11:06:3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15: <text:s/>72%|███████▏ <text:s/>| 1215/1680 [7:35:42&lt;05:55, <text:s/>1.31it/s](25_w,50)-aCMA-ES (mu_w=14.0,w_1=14%) in dimension 30 (seed=1090382, Tue Jun <text:s/>3 11:06:3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16: <text:s/>72%|███████▏ <text:s/>| 1216/1680 [7:35:43&lt;05:42, <text:s/>1.36it/s](25_w,50)-aCMA-ES (mu_w=14.0,w_1=14%) in dimension 30 (seed=998079, Tue Jun <text:s/>3 11:06:40 2025)</text:p>
      <text:p text:style-name="Standard">Batch Testing Optimizer CMAES with Problem Batch 4, Run 17: <text:s/>72%|███████▏ <text:s/>| 1217/1680 [7:35:43&lt;05:33, <text:s/>1.39it/s](25_w,50)-aCMA-ES (mu_w=14.0,w_1=14%) in dimension 30 (seed=1024008, Tue Jun <text:s/>3 11:06:4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18: <text:s/>72%|███████▎ <text:s/>| 1218/1680 [7:35:44&lt;05:26, <text:s/>1.41it/s](25_w,50)-aCMA-ES (mu_w=14.0,w_1=14%) in dimension 30 (seed=1042413, Tue Jun <text:s/>3 11:06:4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4, Run 19: <text:s/>73%|███████▎ <text:s/>| 1219/1680 [7:35:45&lt;05:22, <text:s/>1.43it/s](25_w,50)-aCMA-ES (mu_w=14.0,w_1=14%) in dimension 30 (seed=1053822, Tue Jun <text:s/>3 11:06:4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0: <text:s/>73%|███████▎ <text:s/>| 1220/1680 [7:35:45&lt;05:19, <text:s/>1.44it/s] (25_w,50)-aCMA-ES (mu_w=14.0,w_1=14%) in dimension 30 (seed=938657, Tue Jun <text:s/>3 11:06:4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5, Run 1: <text:s/>73%|███████▎ <text:s/>| 1221/1680 [7:35:46&lt;05:20, <text:s/>1.43it/s](25_w,50)-aCMA-ES (mu_w=14.0,w_1=14%) in dimension 30 (seed=1055459, Tue Jun <text:s/>3 11:06:4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2: <text:s/>73%|███████▎ <text:s/>| 1222/1680 [7:35:47&lt;05:17, <text:s/>1.44it/s](25_w,50)-aCMA-ES (mu_w=14.0,w_1=14%) in dimension 30 (seed=1009251, Tue Jun <text:s/>3 11:06:4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3: <text:s/>73%|███████▎ <text:s/>| 1223/1680 [7:35:47&lt;05:19, <text:s/>1.43it/s](25_w,50)-aCMA-ES (mu_w=14.0,w_1=14%) in dimension 30 (seed=1033867, Tue Jun <text:s/>3 11:06:4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4: <text:s/>73%|███████▎ <text:s/>| 1224/1680 [7:35:48&lt;05:20, <text:s/>1.42it/s](25_w,50)-aCMA-ES (mu_w=14.0,w_1=14%) in dimension 30 (seed=1092987, Tue Jun <text:s/>3 11:06:4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5: <text:s/>73%|███████▎ <text:s/>| 1225/1680 [7:35:49&lt;05:22, <text:s/>1.41it/s](25_w,50)-aCMA-ES (mu_w=14.0,w_1=14%) in dimension 30 (seed=985052, Tue Jun <text:s/>3 11:06:4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6: <text:s/>73%|███████▎ <text:s/>| 1226/1680 [7:35:51&lt;07:48, <text:s/>1.03s/it](25_w,50)-aCMA-ES (mu_w=14.0,w_1=14%) in dimension 30 (seed=1033623, Tue Jun <text:s/>3 11:06:4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7: <text:s/>73%|███████▎ <text:s/>| 1227/1680 [7:35:53&lt;11:13, <text:s/>1.49s/it](25_w,50)-aCMA-ES (mu_w=14.0,w_1=14%) in dimension 30 (seed=1031012, Tue Jun <text:s/>3 11:06:5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5, Run 8: <text:s/>73%|███████▎ <text:s/>| 1228/1680 [7:35:55&lt;12:20, <text:s/>1.64s/it](25_w,50)-aCMA-ES (mu_w=14.0,w_1=14%) in dimension 30 (seed=1089194, Tue Jun <text:s/>3 11:06:5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9: <text:s/>73%|███████▎ <text:s/>| 1229/1680 [7:35:56&lt;11:14, <text:s/>1.50s/it](25_w,50)-aCMA-ES (mu_w=14.0,w_1=14%) in dimension 30 (seed=1032370, Tue Jun <text:s/>3 11:06:5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0: <text:s/>73%|███████▎ <text:s/>| 1230/1680 [7:35:57&lt;10:21, <text:s/>1.38s/it](25_w,50)-aCMA-ES (mu_w=14.0,w_1=14%) in dimension 30 (seed=1035968, Tue Jun <text:s/>3 11:06:5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06194, Tue Jun <text:s/>3 11:06:56 2025)</text:p>
      <text:p text:style-name="Standard">Batch Testing Optimizer CMAES with Problem Batch 5, Run 11: <text:s/>73%|███████▎ <text:s/>| 1231/1680 [7:35:59&lt;09:47, <text:s/>1.31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2: <text:s/>73%|███████▎ <text:s/>| 1232/1680 [7:36:00&lt;09:07, <text:s/>1.22s/it](25_w,50)-aCMA-ES (mu_w=14.0,w_1=14%) in dimension 30 (seed=1053835, Tue Jun <text:s/>3 11:06:5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3: <text:s/>73%|███████▎ <text:s/>| 1233/1680 [7:36:00&lt;08:24, <text:s/>1.13s/it](25_w,50)-aCMA-ES (mu_w=14.0,w_1=14%) in dimension 30 (seed=1031684, Tue Jun <text:s/>3 11:06:5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4: <text:s/>73%|███████▎ <text:s/>| 1234/1680 [7:36:01&lt;07:59, <text:s/>1.07s/it](25_w,50)-aCMA-ES (mu_w=14.0,w_1=14%) in dimension 30 (seed=949134, Tue Jun <text:s/>3 11:06:5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5: <text:s/>74%|███████▎ <text:s/>| 1235/1680 [7:36:02&lt;07:38, <text:s/>1.03s/it](25_w,50)-aCMA-ES (mu_w=14.0,w_1=14%) in dimension 30 (seed=941631, Tue Jun <text:s/>3 11:07:00 2025)</text:p>
      <text:p text:style-name="Standard"><text:soft-page-break/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6: <text:s/>74%|███████▎ <text:s/>| 1236/1680 [7:36:03&lt;07:20, <text:s/>1.01it/s](25_w,50)-aCMA-ES (mu_w=14.0,w_1=14%) in dimension 30 (seed=1004637, Tue Jun <text:s/>3 11:07:0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7: <text:s/>74%|███████▎ <text:s/>| 1237/1680 [7:36:04&lt;07:23, <text:s/>1.00s/it](25_w,50)-aCMA-ES (mu_w=14.0,w_1=14%) in dimension 30 (seed=940721, Tue Jun <text:s/>3 11:07:0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8: <text:s/>74%|███████▎ <text:s/>| 1238/1680 [7:36:05&lt;07:10, <text:s/>1.03it/s](25_w,50)-aCMA-ES (mu_w=14.0,w_1=14%) in dimension 30 (seed=986662, Tue Jun <text:s/>3 11:07:0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5, Run 19: <text:s/>74%|███████▍ <text:s/>| 1239/1680 [7:36:06&lt;07:01, <text:s/>1.05it/s](25_w,50)-aCMA-ES (mu_w=14.0,w_1=14%) in dimension 30 (seed=1062572, Tue Jun <text:s/>3 11:07:0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0: <text:s/>74%|███████▍ <text:s/>| 1240/1680 [7:36:07&lt;07:01, <text:s/>1.04it/s] (25_w,50)-aCMA-ES (mu_w=14.0,w_1=14%) in dimension 30 (seed=1053225, Tue Jun <text:s/>3 11:07:0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: <text:s/>74%|███████▍ <text:s/>| 1241/1680 [7:36:09&lt;08:15, <text:s/>1.13s/it](25_w,50)-aCMA-ES (mu_w=14.0,w_1=14%) in dimension 30 (seed=1028775, Tue Jun <text:s/>3 11:07:0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2: <text:s/>74%|███████▍ <text:s/>| 1242/1680 [7:36:10&lt;09:17, <text:s/>1.27s/it](25_w,50)-aCMA-ES (mu_w=14.0,w_1=14%) in dimension 30 (seed=943126, Tue Jun <text:s/>3 11:07:0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6, Run 3: <text:s/>74%|███████▍ <text:s/>| 1243/1680 [7:36:12&lt;09:59, <text:s/>1.37s/it](25_w,50)-aCMA-ES (mu_w=14.0,w_1=14%) in dimension 30 (seed=1067977, Tue Jun <text:s/>3 11:07:0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4: <text:s/>74%|███████▍ <text:s/>| 1244/1680 [7:36:13&lt;10:28, <text:s/>1.44s/it](25_w,50)-aCMA-ES (mu_w=14.0,w_1=14%) in dimension 30 (seed=980354, Tue Jun <text:s/>3 11:07:11 2025)</text:p>
      <text:p text:style-name="Standard">Batch Testing Optimizer CMAES with Problem Batch 6, Run 5: <text:s/>74%|███████▍ <text:s/>| 1245/1680 [7:36:15&lt;10:47, <text:s/>1.49s/it](25_w,50)-aCMA-ES (mu_w=14.0,w_1=14%) in dimension 30 (seed=1067499, Tue Jun <text:s/>3 11:07:1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6: <text:s/>74%|███████▍ <text:s/>| 1246/1680 [7:36:17&lt;10:55, <text:s/>1.51s/it](25_w,50)-aCMA-ES (mu_w=14.0,w_1=14%) in dimension 30 (seed=976629, Tue Jun <text:s/>3 11:07:1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7: <text:s/>74%|███████▍ <text:s/>| 1247/1680 [7:36:18&lt;10:28, <text:s/>1.45s/it](25_w,50)-aCMA-ES (mu_w=14.0,w_1=14%) in dimension 30 (seed=1024263, Tue Jun <text:s/>3 11:07:1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8: <text:s/>74%|███████▍ <text:s/>| 1248/1680 [7:36:19&lt;10:13, <text:s/>1.42s/it](25_w,50)-aCMA-ES (mu_w=14.0,w_1=14%) in dimension 30 (seed=935555, Tue Jun <text:s/>3 11:07:1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9: <text:s/>74%|███████▍ <text:s/>| 1249/1680 [7:36:22&lt;12:30, <text:s/>1.74s/it](25_w,50)-aCMA-ES (mu_w=14.0,w_1=14%) in dimension 30 (seed=990301, Tue Jun <text:s/>3 11:07:1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0: <text:s/>74%|███████▍ <text:s/>| 1250/1680 [7:36:24&lt;12:36, <text:s/>1.76s/it](25_w,50)-aCMA-ES (mu_w=14.0,w_1=14%) in dimension 30 (seed=958884, Tue Jun <text:s/>3 11:07:2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6, Run 11: <text:s/>74%|███████▍ <text:s/>| 1251/1680 [7:36:25&lt;12:53, <text:s/>1.80s/it](25_w,50)-aCMA-ES (mu_w=14.0,w_1=14%) in dimension 30 (seed=1027354, Tue Jun <text:s/>3 11:07:2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2: <text:s/>75%|███████▍ <text:s/>| 1252/1680 [7:36:27&lt;12:28, <text:s/>1.75s/it](25_w,50)-aCMA-ES (mu_w=14.0,w_1=14%) in dimension 30 (seed=1028133, Tue Jun <text:s/>3 11:07:2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3: <text:s/>75%|███████▍ <text:s/>| 1253/1680 [7:36:29&lt;12:09, <text:s/>1.71s/it](25_w,50)-aCMA-ES (mu_w=14.0,w_1=14%) in dimension 30 (seed=1030393, Tue Jun <text:s/>3 11:07:2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4: <text:s/>75%|███████▍ <text:s/>| 1254/1680 [7:36:30&lt;11:54, <text:s/>1.68s/it](25_w,50)-aCMA-ES (mu_w=14.0,w_1=14%) in dimension 30 (seed=955511, Tue Jun <text:s/>3 11:07:2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5: <text:s/>75%|███████▍ <text:s/>| 1255/1680 [7:36:32&lt;11:42, <text:s/>1.65s/it](25_w,50)-aCMA-ES (mu_w=14.0,w_1=14%) in dimension 30 (seed=1005683, Tue Jun <text:s/>3 11:07:2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6: <text:s/>75%|███████▍ <text:s/>| 1256/1680 [7:36:33&lt;11:35, <text:s/>1.64s/it](25_w,50)-aCMA-ES (mu_w=14.0,w_1=14%) in dimension 30 (seed=963507, Tue Jun <text:s/>3 11:07:3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6, Run 17: <text:s/>75%|███████▍ <text:s/>| 1257/1680 [7:36:35&lt;11:30, <text:s/>1.63s/it](25_w,50)-aCMA-ES (mu_w=14.0,w_1=14%) in dimension 30 (seed=1087398, Tue Jun <text:s/>3 11:07:32 2025)</text:p>
      <text:p text:style-name="Standard">Batch Testing Optimizer CMAES with Problem Batch 6, Run 18: <text:s/>75%|███████▍ <text:s/>| 1258/1680 [7:36:37&lt;11:24, <text:s/>1.62s/it](25_w,50)-aCMA-ES (mu_w=14.0,w_1=14%) in dimension 30 (seed=1029536, Tue Jun <text:s/>3 11:07:3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6, Run 19: <text:s/>75%|███████▍ <text:s/>| 1259/1680 [7:36:38&lt;11:07, <text:s/>1.59s/it](25_w,50)-aCMA-ES (mu_w=14.0,w_1=14%) in dimension 30 (seed=1022073, Tue Jun <text:s/>3 11:07:3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0: <text:s/>75%|███████▌ <text:s/>| 1260/1680 [7:36:39&lt;09:34, <text:s/>1.37s/it] (25_w,50)-aCMA-ES (mu_w=14.0,w_1=14%) in dimension 30 (seed=1048660, Tue Jun <text:s/>3 11:07:3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: <text:s/>75%|███████▌ <text:s/>| 1261/1680 [7:36:40&lt;08:26, <text:s/>1.21s/it](25_w,50)-aCMA-ES (mu_w=14.0,w_1=14%) in dimension 30 (seed=998010, Tue Jun <text:s/>3 11:07:3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90275, Tue Jun <text:s/>3 11:07:38 2025)</text:p>
      <text:p text:style-name="Standard">Batch Testing Optimizer CMAES with Problem Batch 7, Run 2: <text:s/>75%|███████▌ <text:s/>| 1262/1680 [7:36:41&lt;07:36, <text:s/>1.09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3: <text:s/>75%|███████▌ <text:s/>| 1263/1680 [7:36:41&lt;06:44, <text:s/>1.03it/s](25_w,50)-aCMA-ES (mu_w=14.0,w_1=14%) in dimension 30 (seed=951745, Tue Jun <text:s/>3 11:07:3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4: <text:s/>75%|███████▌ <text:s/>| 1264/1680 [7:36:42&lt;06:02, <text:s/>1.15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28186, Tue Jun <text:s/>3 11:07:39 2025)</text:p>
      <text:p text:style-name="Standard"><text:s text:c="2"/>np.abs(np.cross((b - a), (x - a), axis = 0)) / d_ab, <text:s/># Perpendicular distance</text:p>
      <text:p text:style-name="Standard">Batch Testing Optimizer CMAES with Problem Batch 7, Run 5: <text:s/>75%|███████▌ <text:s/>| 1265/1680 [7:36:43&lt;05:34, <text:s/>1.24it/s](25_w,50)-aCMA-ES (mu_w=14.0,w_1=14%) in dimension 30 (seed=975706, Tue Jun <text:s/>3 11:07:4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7, Run 6: <text:s/>75%|███████▌ <text:s/>| 1266/1680 [7:36:43&lt;05:13, <text:s/>1.32it/s](25_w,50)-aCMA-ES (mu_w=14.0,w_1=14%) in dimension 30 (seed=945674, Tue Jun <text:s/>3 11:07:4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7: <text:s/>75%|███████▌ <text:s/>| 1267/1680 [7:36:44&lt;05:00, <text:s/>1.38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14621, Tue Jun <text:s/>3 11:07:41 2025)</text:p>
      <text:p text:style-name="Standard"><text:s text:c="2"/>np.abs(np.cross((b - a), (x - a), axis = 0)) / d_ab, <text:s/># Perpendicular distance</text:p>
      <text:p text:style-name="Standard">Batch Testing Optimizer CMAES with Problem Batch 7, Run 8: <text:s/>75%|███████▌ <text:s/>| 1268/1680 [7:36:45&lt;04:50, <text:s/>1.42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987460, Tue Jun <text:s/>3 11:07:42 2025)</text:p>
      <text:p text:style-name="Standard"><text:s text:c="2"/>np.abs(np.cross((b - a), (x - a), axis = 0)) / d_ab, <text:s/># Perpendicular distance</text:p>
      <text:p text:style-name="Standard">Batch Testing Optimizer CMAES with Problem Batch 7, Run 9: <text:s/>76%|███████▌ <text:s/>| 1269/1680 [7:36:45&lt;04:43, <text:s/>1.45it/s](25_w,50)-aCMA-ES (mu_w=14.0,w_1=14%) in dimension 30 (seed=977671, Tue Jun <text:s/>3 11:07:4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14256, Tue Jun <text:s/>3 11:07:43 2025)</text:p>
      <text:p text:style-name="Standard">Batch Testing Optimizer CMAES with Problem Batch 7, Run 10: <text:s/>76%|███████▌ <text:s/>| 1270/1680 [7:36:46&lt;04:38, <text:s/>1.47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1: <text:s/>76%|███████▌ <text:s/>| 1271/1680 [7:36:47&lt;04:35, <text:s/>1.48it/s](25_w,50)-aCMA-ES (mu_w=14.0,w_1=14%) in dimension 30 (seed=1009450, Tue Jun <text:s/>3 11:07:4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2: <text:s/>76%|███████▌ <text:s/>| 1272/1680 [7:36:47&lt;04:33, <text:s/>1.49it/s](25_w,50)-aCMA-ES (mu_w=14.0,w_1=14%) in dimension 30 (seed=952448, Tue Jun <text:s/>3 11:07:4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3: <text:s/>76%|███████▌ <text:s/>| 1273/1680 [7:36:48&lt;04:31, <text:s/>1.50it/s](25_w,50)-aCMA-ES (mu_w=14.0,w_1=14%) in dimension 30 (seed=1090661, Tue Jun <text:s/>3 11:07:45 2025)</text:p>
      <text:p text:style-name="Standard"><text:soft-page-break/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4: <text:s/>76%|███████▌ <text:s/>| 1274/1680 [7:36:49&lt;04:29, <text:s/>1.51it/s](25_w,50)-aCMA-ES (mu_w=14.0,w_1=14%) in dimension 30 (seed=975393, Tue Jun <text:s/>3 11:07:4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5: <text:s/>76%|███████▌ <text:s/>| 1275/1680 [7:36:49&lt;04:34, <text:s/>1.47it/s](25_w,50)-aCMA-ES (mu_w=14.0,w_1=14%) in dimension 30 (seed=968486, Tue Jun <text:s/>3 11:07:4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6: <text:s/>76%|███████▌ <text:s/>| 1276/1680 [7:36:50&lt;05:39, <text:s/>1.19it/s](25_w,50)-aCMA-ES (mu_w=14.0,w_1=14%) in dimension 30 (seed=1046802, Tue Jun <text:s/>3 11:07:4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7: <text:s/>76%|███████▌ <text:s/>| 1277/1680 [7:36:52&lt;06:12, <text:s/>1.08it/s](25_w,50)-aCMA-ES (mu_w=14.0,w_1=14%) in dimension 30 (seed=990882, Tue Jun <text:s/>3 11:07:4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8: <text:s/>76%|███████▌ <text:s/>| 1278/1680 [7:36:53&lt;06:13, <text:s/>1.08it/s](25_w,50)-aCMA-ES (mu_w=14.0,w_1=14%) in dimension 30 (seed=970145, Tue Jun <text:s/>3 11:07:5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7, Run 19: <text:s/>76%|███████▌ <text:s/>| 1279/1680 [7:36:53&lt;05:51, <text:s/>1.14it/s](25_w,50)-aCMA-ES (mu_w=14.0,w_1=14%) in dimension 30 (seed=983924, Tue Jun <text:s/>3 11:07:5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0: <text:s/>76%|███████▌ <text:s/>| 1280/1680 [7:36:54&lt;05:23, <text:s/>1.24it/s] (25_w,50)-aCMA-ES (mu_w=14.0,w_1=14%) in dimension 30 (seed=1006059, Tue Jun <text:s/>3 11:07:5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8, Run 1: <text:s/>76%|███████▋ <text:s/>| 1281/1680 [7:36:55&lt;05:04, <text:s/>1.31it/s](25_w,50)-aCMA-ES (mu_w=14.0,w_1=14%) in dimension 30 (seed=988802, Tue Jun <text:s/>3 11:07:5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70924, Tue Jun <text:s/>3 11:07:53 2025)</text:p>
      <text:p text:style-name="Standard">Batch Testing Optimizer CMAES with Problem Batch 8, Run 2: <text:s/>76%|███████▋ <text:s/>| 1282/1680 [7:36:55&lt;04:51, <text:s/>1.37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3: <text:s/>76%|███████▋ <text:s/>| 1283/1680 [7:36:56&lt;04:41, <text:s/>1.41it/s](25_w,50)-aCMA-ES (mu_w=14.0,w_1=14%) in dimension 30 (seed=1004882, Tue Jun <text:s/>3 11:07:53 2025)</text:p>
      <text:p text:style-name="Standard">Batch Testing Optimizer CMAES with Problem Batch 8, Run 4: <text:s/>76%|███████▋ <text:s/>| 1284/1680 [7:36:57&lt;04:35, <text:s/>1.44it/s](25_w,50)-aCMA-ES (mu_w=14.0,w_1=14%) in dimension 30 (seed=1023997, Tue Jun <text:s/>3 11:07:5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5: <text:s/>76%|███████▋ <text:s/>| 1285/1680 [7:36:57&lt;04:31, <text:s/>1.46it/s](25_w,50)-aCMA-ES (mu_w=14.0,w_1=14%) in dimension 30 (seed=945532, Tue Jun <text:s/>3 11:07:55 2025)</text:p>
      <text:p text:style-name="Standard">Batch Testing Optimizer CMAES with Problem Batch 8, Run 6: <text:s/>77%|███████▋ <text:s/>| 1286/1680 [7:36:58&lt;04:27, <text:s/>1.47it/s](25_w,50)-aCMA-ES (mu_w=14.0,w_1=14%) in dimension 30 (seed=1015128, Tue Jun <text:s/>3 11:07:5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31952, Tue Jun <text:s/>3 11:07:56 2025)</text:p>
      <text:p text:style-name="Standard">Batch Testing Optimizer CMAES with Problem Batch 8, Run 8: <text:s/>77%|███████▋ <text:s/>| 1288/1680 [7:36:59&lt;04:23, <text:s/>1.49it/s](25_w,50)-aCMA-ES (mu_w=14.0,w_1=14%) in dimension 30 (seed=972465, Tue Jun <text:s/>3 11:07:5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9: <text:s/>77%|███████▋ <text:s/>| 1289/1680 [7:37:00&lt;04:22, <text:s/>1.49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26268, Tue Jun <text:s/>3 11:07:57 2025)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8, Run 10: <text:s/>77%|███████▋ <text:s/>| 1290/1680 [7:37:01&lt;04:23, <text:s/>1.48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42349, Tue Jun <text:s/>3 11:07:58 2025)</text:p>
      <text:p text:style-name="Standard"><text:s text:c="2"/>np.abs(np.cross((b - a), (x - a), axis = 0)) / d_ab, <text:s/># Perpendicular distance</text:p>
      <text:p text:style-name="Standard">Batch Testing Optimizer CMAES with Problem Batch 8, Run 11: <text:s/>77%|███████▋ <text:s/>| 1291/1680 [7:37:01&lt;04:21, <text:s/>1.49it/s](25_w,50)-aCMA-ES (mu_w=14.0,w_1=14%) in dimension 30 (seed=937036, Tue Jun <text:s/>3 11:07:59 2025)</text:p>
      <text:p text:style-name="Standard">Batch Testing Optimizer CMAES with Problem Batch 8, Run 12: <text:s/>77%|███████▋ <text:s/>| 1292/1680 [7:37:02&lt;04:18, <text:s/>1.50it/s](25_w,50)-aCMA-ES (mu_w=14.0,w_1=14%) in dimension 30 (seed=1065722, Tue Jun <text:s/>3 11:07:59 2025)</text:p>
      <text:p text:style-name="Standard">Batch Testing Optimizer CMAES with Problem Batch 8, Run 13: <text:s/>77%|███████▋ <text:s/>| 1293/1680 [7:37:03&lt;04:15, <text:s/>1.51it/s](25_w,50)-aCMA-ES (mu_w=14.0,w_1=14%) in dimension 30 (seed=1032862, Tue Jun <text:s/>3 11:08:0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14: <text:s/>77%|███████▋ <text:s/>| 1294/1680 [7:37:03&lt;04:13, <text:s/>1.52it/s](25_w,50)-aCMA-ES (mu_w=14.0,w_1=14%) in dimension 30 (seed=967107, Tue Jun <text:s/>3 11:08:0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15: <text:s/>77%|███████▋ <text:s/>| 1295/1680 [7:37:04&lt;04:13, <text:s/>1.52it/s](25_w,50)-aCMA-ES (mu_w=14.0,w_1=14%) in dimension 30 (seed=1034495, Tue Jun <text:s/>3 11:08:01 2025)</text:p>
      <text:p text:style-name="Standard">Batch Testing Optimizer CMAES with Problem Batch 8, Run 16: <text:s/>77%|███████▋ <text:s/>| 1296/1680 [7:37:05&lt;04:44, <text:s/>1.35it/s](25_w,50)-aCMA-ES (mu_w=14.0,w_1=14%) in dimension 30 (seed=1073853, Tue Jun <text:s/>3 11:08:0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17: <text:s/>77%|███████▋ <text:s/>| 1297/1680 [7:37:06&lt;05:38, <text:s/>1.13it/s](25_w,50)-aCMA-ES (mu_w=14.0,w_1=14%) in dimension 30 (seed=1103758, Tue Jun <text:s/>3 11:08:0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8, Run 18: <text:s/>77%|███████▋ <text:s/>| 1298/1680 [7:37:07&lt;06:32, <text:s/>1.03s/it](25_w,50)-aCMA-ES (mu_w=14.0,w_1=14%) in dimension 30 (seed=961263, Tue Jun <text:s/>3 11:08:05 2025)</text:p>
      <text:p text:style-name="Standard">(25_w,50)-aCMA-ES (mu_w=14.0,w_1=14%) in dimension 30 (seed=968216, Tue Jun <text:s/>3 11:08:06 2025)</text:p>
      <text:p text:style-name="Standard">Batch Testing Optimizer CMAES with Problem Batch 9, Run 0: <text:s/>77%|███████▋ <text:s/>| 1300/1680 [7:37:09&lt;05:28, <text:s/>1.16it/s] (25_w,50)-aCMA-ES (mu_w=14.0,w_1=14%) in dimension 30 (seed=1067335, Tue Jun <text:s/>3 11:08:06 2025)</text:p>
      <text:p text:style-name="Standard"><text:soft-page-break/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77375, Tue Jun <text:s/>3 11:08:07 2025)</text:p>
      <text:p text:style-name="Standard">Batch Testing Optimizer CMAES with Problem Batch 9, Run 1: <text:s/>77%|███████▋ <text:s/>| 1301/1680 [7:37:10&lt;05:06, <text:s/>1.24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55308, Tue Jun <text:s/>3 11:08:08 2025)</text:p>
      <text:p text:style-name="Standard">Batch Testing Optimizer CMAES with Problem Batch 9, Run 2: <text:s/>78%|███████▊ <text:s/>| 1302/1680 [7:37:10&lt;04:48, <text:s/>1.31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3: <text:s/>78%|███████▊ <text:s/>| 1303/1680 [7:37:11&lt;04:36, <text:s/>1.37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77275, Tue Jun <text:s/>3 11:08:08 2025)</text:p>
      <text:p text:style-name="Standard"><text:s text:c="2"/>np.abs(np.cross((b - a), (x - a), axis = 0)) / d_ab, <text:s/># Perpendicular distance</text:p>
      <text:p text:style-name="Standard">Batch Testing Optimizer CMAES with Problem Batch 9, Run 4: <text:s/>78%|███████▊ <text:s/>| 1304/1680 [7:37:11&lt;04:26, <text:s/>1.41it/s](25_w,50)-aCMA-ES (mu_w=14.0,w_1=14%) in dimension 30 (seed=997428, Tue Jun <text:s/>3 11:08:0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5: <text:s/>78%|███████▊ <text:s/>| 1305/1680 [7:37:12&lt;04:19, <text:s/>1.44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954718, Tue Jun <text:s/>3 11:08:10 2025)</text:p>
      <text:p text:style-name="Standard"><text:s text:c="2"/>np.abs(np.cross((b - a), (x - a), axis = 0)) / d_ab, <text:s/># Perpendicular distance</text:p>
      <text:p text:style-name="Standard">Batch Testing Optimizer CMAES with Problem Batch 9, Run 6: <text:s/>78%|███████▊ <text:s/>| 1306/1680 [7:37:13&lt;04:14, <text:s/>1.47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55422, Tue Jun <text:s/>3 11:08:10 2025)</text:p>
      <text:p text:style-name="Standard"><text:s text:c="2"/>np.abs(np.cross((b - a), (x - a), axis = 0)) / d_ab, <text:s/># Perpendicular distance</text:p>
      <text:p text:style-name="Standard">Batch Testing Optimizer CMAES with Problem Batch 9, Run 7: <text:s/>78%|███████▊ <text:s/>| 1307/1680 [7:37:13&lt;04:10, <text:s/>1.49it/s](25_w,50)-aCMA-ES (mu_w=14.0,w_1=14%) in dimension 30 (seed=995754, Tue Jun <text:s/>3 11:08:1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(25_w,50)-aCMA-ES (mu_w=14.0,w_1=14%) in dimension 30 (seed=1092957, Tue Jun <text:s/>3 11:08:11 2025)</text:p>
      <text:p text:style-name="Standard">Batch Testing Optimizer CMAES with Problem Batch 9, Run 8: <text:s/>78%|███████▊ <text:s/>| 1308/1680 [7:37:14&lt;04:07, <text:s/>1.50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9: <text:s/>78%|███████▊ <text:s/>| 1309/1680 [7:37:15&lt;04:06, <text:s/>1.51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31721, Tue Jun <text:s/>3 11:08:12 2025)</text:p>
      <text:p text:style-name="Standard"><text:s text:c="2"/>np.abs(np.cross((b - a), (x - a), axis = 0)) / d_ab, <text:s/># Perpendicular distance</text:p>
      <text:p text:style-name="Standard">Batch Testing Optimizer CMAES with Problem Batch 9, Run 10: <text:s/>78%|███████▊ <text:s/>| 1310/1680 [7:37:15&lt;04:04, <text:s/>1.51it/s](25_w,50)-aCMA-ES (mu_w=14.0,w_1=14%) in dimension 30 (seed=1026206, Tue Jun <text:s/>3 11:08:13 2025)</text:p>
      <text:p text:style-name="Standard">Batch Testing Optimizer CMAES with Problem Batch 9, Run 11: <text:s/>78%|███████▊ <text:s/>| 1311/1680 [7:37:16&lt;04:03, <text:s/>1.52it/s](25_w,50)-aCMA-ES (mu_w=14.0,w_1=14%) in dimension 30 (seed=1100632, Tue Jun <text:s/>3 11:08:1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12: <text:s/>78%|███████▊ <text:s/>| 1312/1680 [7:37:17&lt;04:01, <text:s/>1.52it/s](25_w,50)-aCMA-ES (mu_w=14.0,w_1=14%) in dimension 30 (seed=1021114, Tue Jun <text:s/>3 11:08:1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13: <text:s/>78%|███████▊ <text:s/>| 1313/1680 [7:37:17&lt;04:00, <text:s/>1.52it/s](25_w,50)-aCMA-ES (mu_w=14.0,w_1=14%) in dimension 30 (seed=968473, Tue Jun <text:s/>3 11:08:1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14: <text:s/>78%|███████▊ <text:s/>| 1314/1680 [7:37:18&lt;03:59, <text:s/>1.53it/s](25_w,50)-aCMA-ES (mu_w=14.0,w_1=14%) in dimension 30 (seed=1042924, Tue Jun <text:s/>3 11:08:1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90152, Tue Jun <text:s/>3 11:08:16 2025)</text:p>
      <text:p text:style-name="Standard">Batch Testing Optimizer CMAES with Problem Batch 9, Run 15: <text:s/>78%|███████▊ <text:s/>| 1315/1680 [7:37:19&lt;03:58, <text:s/>1.53it/s]/home/lin_eclipse/anaconda3/envs/metaevobox_env/lib/python3.11/site-packages/metaevobox/environment/problem/SOO/UAV/uav_numpy.py:229: RuntimeWarning: invalid value encountered in divide</text:p>
      <text:p text:style-name="Standard"><text:soft-page-break/><text:s text:c="2"/>np.abs(np.cross((b - a), (x - a), axis = 0)) / d_ab, <text:s/># Perpendicular distance</text:p>
      <text:p text:style-name="Standard">Batch Testing Optimizer CMAES with Problem Batch 9, Run 16: <text:s/>78%|███████▊ <text:s/>| 1316/1680 [7:37:19&lt;04:17, <text:s/>1.42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80992, Tue Jun <text:s/>3 11:08:17 2025)</text:p>
      <text:p text:style-name="Standard">Batch Testing Optimizer CMAES with Problem Batch 9, Run 17: <text:s/>78%|███████▊ <text:s/>| 1317/1680 [7:37:21&lt;05:11, <text:s/>1.17it/s](25_w,50)-aCMA-ES (mu_w=14.0,w_1=14%) in dimension 30 (seed=1049971, Tue Jun <text:s/>3 11:08:1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18: <text:s/>78%|███████▊ <text:s/>| 1318/1680 [7:37:22&lt;06:23, <text:s/>1.06s/it](25_w,50)-aCMA-ES (mu_w=14.0,w_1=14%) in dimension 30 (seed=991544, Tue Jun <text:s/>3 11:08:2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9, Run 19: <text:s/>79%|███████▊ <text:s/>| 1319/1680 [7:37:23&lt;05:44, <text:s/>1.05it/s](25_w,50)-aCMA-ES (mu_w=14.0,w_1=14%) in dimension 30 (seed=1025641, Tue Jun <text:s/>3 11:08:2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0: <text:s/>79%|███████▊ <text:s/>| 1320/1680 [7:37:24&lt;05:15, <text:s/>1.14it/s](25_w,50)-aCMA-ES (mu_w=14.0,w_1=14%) in dimension 30 (seed=1039002, Tue Jun <text:s/>3 11:08:2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1: <text:s/>79%|███████▊ <text:s/>| 1321/1680 [7:37:24&lt;04:52, <text:s/>1.23it/s](25_w,50)-aCMA-ES (mu_w=14.0,w_1=14%) in dimension 30 (seed=962785, Tue Jun <text:s/>3 11:08:2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2: <text:s/>79%|███████▊ <text:s/>| 1322/1680 [7:37:25&lt;04:35, <text:s/>1.30it/s](25_w,50)-aCMA-ES (mu_w=14.0,w_1=14%) in dimension 30 (seed=1090169, Tue Jun <text:s/>3 11:08:2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3: <text:s/>79%|███████▉ <text:s/>| 1323/1680 [7:37:26&lt;04:22, <text:s/>1.36it/s]/home/lin_eclipse/anaconda3/envs/metaevobox_env/lib/python3.11/site-<text:soft-page-break/>packages/metaevobox/environment/problem/SOO/UAV/uav_numpy.py:229: RuntimeWarning: invalid value encountered in divide</text:p>
      <text:p text:style-name="Standard">(25_w,50)-aCMA-ES (mu_w=14.0,w_1=14%) in dimension 30 (seed=1011998, Tue Jun <text:s/>3 11:08:23 2025)</text:p>
      <text:p text:style-name="Standard"><text:s text:c="2"/>np.abs(np.cross((b - a), (x - a), axis = 0)) / d_ab, <text:s/># Perpendicular distance</text:p>
      <text:p text:style-name="Standard">Batch Testing Optimizer CMAES with Problem Batch 10, Run 4: <text:s/>79%|███████▉ <text:s/>| 1324/1680 [7:37:26&lt;04:12, <text:s/>1.41it/s](25_w,50)-aCMA-ES (mu_w=14.0,w_1=14%) in dimension 30 (seed=998081, Tue Jun <text:s/>3 11:08:2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5: <text:s/>79%|███████▉ <text:s/>| 1325/1680 [7:37:27&lt;04:05, <text:s/>1.45it/s](25_w,50)-aCMA-ES (mu_w=14.0,w_1=14%) in dimension 30 (seed=1022162, Tue Jun <text:s/>3 11:08:2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6: <text:s/>79%|███████▉ <text:s/>| 1326/1680 [7:37:28&lt;04:00, <text:s/>1.47it/s](25_w,50)-aCMA-ES (mu_w=14.0,w_1=14%) in dimension 30 (seed=1044528, Tue Jun <text:s/>3 11:08:2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7: <text:s/>79%|███████▉ <text:s/>| 1327/1680 [7:37:28&lt;03:56, <text:s/>1.49it/s](25_w,50)-aCMA-ES (mu_w=14.0,w_1=14%) in dimension 30 (seed=935351, Tue Jun <text:s/>3 11:08:26 2025)</text:p>
      <text:p text:style-name="Standard">Batch Testing Optimizer CMAES with Problem Batch 10, Run 8: <text:s/>79%|███████▉ <text:s/>| 1328/1680 [7:37:29&lt;03:53, <text:s/>1.51it/s](25_w,50)-aCMA-ES (mu_w=14.0,w_1=14%) in dimension 30 (seed=1060482, Tue Jun <text:s/>3 11:08:2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9: <text:s/>79%|███████▉ <text:s/>| 1329/1680 [7:37:30&lt;03:50, <text:s/>1.52it/s](25_w,50)-aCMA-ES (mu_w=14.0,w_1=14%) in dimension 30 (seed=1012202, Tue Jun <text:s/>3 11:08:2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10: <text:s/>79%|███████▉ <text:s/>| 1330/1680 [7:37:30&lt;03:50, <text:s/>1.52it/s](25_w,50)-aCMA-ES (mu_w=14.0,w_1=14%) in dimension 30 (seed=944368, Tue Jun <text:s/>3 11:08:2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11: <text:s/>79%|███████▉ <text:s/>| 1331/1680 [7:37:31&lt;03:48, <text:s/><text:soft-page-break/>1.52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06303, Tue Jun <text:s/>3 11:08:28 2025)</text:p>
      <text:p text:style-name="Standard"><text:s text:c="2"/>np.abs(np.cross((b - a), (x - a), axis = 0)) / d_ab, <text:s/># Perpendicular distance</text:p>
      <text:p text:style-name="Standard">Batch Testing Optimizer CMAES with Problem Batch 10, Run 12: <text:s/>79%|███████▉ <text:s/>| 1332/1680 [7:37:31&lt;03:47, <text:s/>1.53it/s](25_w,50)-aCMA-ES (mu_w=14.0,w_1=14%) in dimension 30 (seed=968606, Tue Jun <text:s/>3 11:08:2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13: <text:s/>79%|███████▉ <text:s/>| 1333/1680 [7:37:32&lt;03:46, <text:s/>1.53it/s](25_w,50)-aCMA-ES (mu_w=14.0,w_1=14%) in dimension 30 (seed=1055899, Tue Jun <text:s/>3 11:08:2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78283, Tue Jun <text:s/>3 11:08:30 2025)</text:p>
      <text:p text:style-name="Standard">Batch Testing Optimizer CMAES with Problem Batch 10, Run 14: <text:s/>79%|███████▉ <text:s/>| 1334/1680 [7:37:33&lt;03:44, <text:s/>1.54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15: <text:s/>79%|███████▉ <text:s/>| 1335/1680 [7:37:33&lt;03:44, <text:s/>1.54it/s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39869, Tue Jun <text:s/>3 11:08:31 2025)</text:p>
      <text:p text:style-name="Standard"><text:s text:c="2"/>np.abs(np.cross((b - a), (x - a), axis = 0)) / d_ab, <text:s/># Perpendicular distance</text:p>
      <text:p text:style-name="Standard">Batch Testing Optimizer CMAES with Problem Batch 10, Run 16: <text:s/>80%|███████▉ <text:s/>| 1336/1680 [7:37:34&lt;03:45, <text:s/>1.52it/s](25_w,50)-aCMA-ES (mu_w=14.0,w_1=14%) in dimension 30 (seed=1046889, Tue Jun <text:s/>3 11:08:3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68855, Tue Jun <text:s/>3 11:08:33 2025)</text:p>
      <text:p text:style-name="Standard">Batch Testing Optimizer CMAES with Problem Batch 10, Run 17: <text:s/>80%|███████▉ <text:s/>| 1337/1680 [7:37:36&lt;05:05, <text:s/>1.12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10, Run 18: <text:s/>80%|███████▉ <text:s/>| 1338/1680 [7:37:37&lt;06:33, <text:s/>1.15s/it](25_w,50)-aCMA-ES (mu_w=14.0,w_1=14%) in dimension 30 (seed=996424, Tue Jun <text:s/>3 11:08:3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0, Run 19: <text:s/>80%|███████▉ <text:s/>| 1339/1680 [7:37:39&lt;07:52, <text:s/>1.39s/it](25_w,50)-aCMA-ES (mu_w=14.0,w_1=14%) in dimension 30 (seed=952817, Tue Jun <text:s/>3 11:08:3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1, Run 0: <text:s/>80%|███████▉ <text:s/>| 1340/1680 [7:37:40&lt;07:09, <text:s/>1.26s/it] (25_w,50)-aCMA-ES (mu_w=14.0,w_1=14%) in dimension 30 (seed=1013345, Tue Jun <text:s/>3 11:08:3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21419, Tue Jun <text:s/>3 11:08:38 2025)</text:p>
      <text:p text:style-name="Standard">Batch Testing Optimizer CMAES with Problem Batch 11, Run 1: <text:s/>80%|███████▉ <text:s/>| 1341/1680 [7:37:41&lt;06:23, <text:s/>1.13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1, Run 2: <text:s/>80%|███████▉ <text:s/>| 1342/1680 [7:37:42&lt;05:47, <text:s/>1.03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52253, Tue Jun <text:s/>3 11:08:39 2025)</text:p>
      <text:p text:style-name="Standard">Batch Testing Optimizer CMAES with Problem Batch 11, Run 3: <text:s/>80%|███████▉ <text:s/>| 1343/1680 [7:37:43&lt;05:13, <text:s/>1.08it/s](25_w,50)-aCMA-ES (mu_w=14.0,w_1=14%) in dimension 30 (seed=978550, Tue Jun <text:s/>3 11:08:40 2025)</text:p>
      <text:p text:style-name="Standard">Batch Testing Optimizer CMAES with Problem Batch 11, Run 4: <text:s/>80%|████████ <text:s/>| 1344/1680 [7:37:43&lt;04:46, <text:s/>1.17it/s](25_w,50)-aCMA-ES (mu_w=14.0,w_1=14%) in dimension 30 (seed=976071, Tue Jun <text:s/>3 11:08:4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1, Run 5: <text:s/>80%|████████ <text:s/>| 1345/1680 [7:37:44&lt;04:28, <text:s/>1.25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85130, Tue Jun <text:s/>3 11:08:41 2025)</text:p>
      <text:p text:style-name="Standard"><text:soft-page-break/>Batch Testing Optimizer CMAES with Problem Batch 11, Run 6: <text:s/>80%|████████ <text:s/>| 1346/1680 [7:37:45&lt;04:15, <text:s/>1.31it/s](25_w,50)-aCMA-ES (mu_w=14.0,w_1=14%) in dimension 30 (seed=1054850, Tue Jun <text:s/>3 11:08:42 2025)</text:p>
      <text:p text:style-name="Standard">Batch Testing Optimizer CMAES with Problem Batch 11, Run 7: <text:s/>80%|████████ <text:s/>| 1347/1680 [7:37:45&lt;04:07, <text:s/>1.35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37010, Tue Jun <text:s/>3 11:08:43 2025)</text:p>
      <text:p text:style-name="Standard">(25_w,50)-aCMA-ES (mu_w=14.0,w_1=14%) in dimension 30 (seed=1039222, Tue Jun <text:s/>3 11:08:43 2025)</text:p>
      <text:p text:style-name="Standard">Batch Testing Optimizer CMAES with Problem Batch 11, Run 9: <text:s/>80%|████████ <text:s/>| 1349/1680 [7:37:47&lt;04:02, <text:s/>1.36it/s](25_w,50)-aCMA-ES (mu_w=14.0,w_1=14%) in dimension 30 (seed=983315, Tue Jun <text:s/>3 11:08:44 2025)</text:p>
      <text:p text:style-name="Standard">Batch Testing Optimizer CMAES with Problem Batch 11, Run 10: <text:s/>80%|████████ <text:s/>| 1350/1680 [7:37:47&lt;04:00, <text:s/>1.37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12241, Tue Jun <text:s/>3 11:08:45 2025)</text:p>
      <text:p text:style-name="Standard">(25_w,50)-aCMA-ES (mu_w=14.0,w_1=14%) in dimension 30 (seed=1075128, Tue Jun <text:s/>3 11:08:45 2025)</text:p>
      <text:p text:style-name="Standard">Batch Testing Optimizer CMAES with Problem Batch 11, Run 11: <text:s/>80%|████████ <text:s/>| 1351/1680 [7:37:48&lt;03:58, <text:s/>1.38it/s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1, Run 12: <text:s/>80%|████████ <text:s/>| 1352/1680 [7:37:49&lt;03:56, <text:s/>1.38it/s](25_w,50)-aCMA-ES (mu_w=14.0,w_1=14%) in dimension 30 (seed=1032323, Tue Jun <text:s/>3 11:08:46 2025)</text:p>
      <text:p text:style-name="Standard">Batch Testing Optimizer CMAES with Problem Batch 11, Run 13: <text:s/>81%|████████ <text:s/>| 1353/1680 [7:37:51&lt;06:45, <text:s/>1.24s/it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994862, Tue Jun <text:s/>3 11:08:49 2025)</text:p>
      <text:p text:style-name="Standard"><text:s text:c="2"/>np.abs(np.cross((b - a), (x - a), axis = 0)) / d_ab, <text:s/># Perpendicular distance</text:p>
      <text:p text:style-name="Standard">Batch Testing Optimizer CMAES with Problem Batch 11, Run 14: <text:s/>81%|████████ <text:s/>| 1354/1680 [7:37:53&lt;08:06, <text:s/>1.49s/it](25_w,50)-aCMA-ES (mu_w=14.0,w_1=14%) in dimension 30 (seed=1013843, Tue Jun <text:s/>3 11:08:51 2025)</text:p>
      <text:p text:style-name="Standard">Batch Testing Optimizer CMAES with Problem Batch 11, Run 15: <text:s/>81%|████████ <text:s/>| 1355/1680 [7:37:55&lt;08:38, <text:s/>1.60s/it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991357, Tue Jun <text:s/>3 11:08:53 2025)</text:p>
      <text:p text:style-name="Standard"><text:s text:c="2"/>np.abs(np.cross((b - a), (x - a), axis = 0)) / d_ab, <text:s/># Perpendicular distance</text:p>
      <text:p text:style-name="Standard">Batch Testing Optimizer CMAES with Problem Batch 11, Run 16: <text:s/>81%|████████ <text:s/>| 1356/1680 [7:37:57&lt;08:38, <text:s/>1.60s/it](25_w,50)-aCMA-ES (mu_w=14.0,w_1=14%) in dimension 30 (seed=1070015, Tue Jun <text:s/>3 11:08:54 2025)</text:p>
      <text:p text:style-name="Standard"><text:soft-page-break/>(25_w,50)-aCMA-ES (mu_w=14.0,w_1=14%) in dimension 30 (seed=955971, Tue Jun <text:s/>3 11:08:56 2025)</text:p>
      <text:p text:style-name="Standard">Batch Testing Optimizer CMAES with Problem Batch 11, Run 17: <text:s/>81%|████████ <text:s/>| 1357/1680 [7:37:58&lt;08:23, <text:s/>1.56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1, Run 18: <text:s/>81%|████████ <text:s/>| 1358/1680 [7:37:59&lt;07:36, <text:s/>1.42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95653, Tue Jun <text:s/>3 11:08:57 2025)</text:p>
      <text:p text:style-name="Standard">Batch Testing Optimizer CMAES with Problem Batch 11, Run 19: <text:s/>81%|████████ <text:s/>| 1359/1680 [7:38:00&lt;06:56, <text:s/>1.30s/it](25_w,50)-aCMA-ES (mu_w=14.0,w_1=14%) in dimension 30 (seed=997214, Tue Jun <text:s/>3 11:08:58 2025)</text:p>
      <text:p text:style-name="Standard">Batch Testing Optimizer CMAES with Problem Batch 12, Run 0: <text:s/>81%|████████ <text:s/>| 1360/1680 [7:38:01&lt;06:18, <text:s/>1.18s/it] 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973824, Tue Jun <text:s/>3 11:08:59 2025)</text:p>
      <text:p text:style-name="Standard">Batch Testing Optimizer CMAES with Problem Batch 12, Run 1: <text:s/>81%|████████ <text:s/>| 1361/1680 [7:38:02&lt;05:51, <text:s/>1.10s/it](25_w,50)-aCMA-ES (mu_w=14.0,w_1=14%) in dimension 30 (seed=980405, Tue Jun <text:s/>3 11:09:0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2: <text:s/>81%|████████ <text:s/>| 1362/1680 [7:38:03&lt;05:31, <text:s/>1.04s/it](25_w,50)-aCMA-ES (mu_w=14.0,w_1=14%) in dimension 30 (seed=1116165, Tue Jun <text:s/>3 11:09:00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44988, Tue Jun <text:s/>3 11:09:01 2025)</text:p>
      <text:p text:style-name="Standard">Batch Testing Optimizer CMAES with Problem Batch 12, Run 3: <text:s/>81%|████████ <text:s/>| 1363/1680 [7:38:04&lt;05:27, <text:s/>1.03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4: <text:s/>81%|████████ <text:s/>| 1364/1680 [7:38:08&lt;10:19, <text:s/>1.96s/it](25_w,50)-aCMA-ES (mu_w=14.0,w_1=14%) in dimension 30 (seed=964473, Tue Jun <text:s/>3 11:09:0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12, Run 5: <text:s/>81%|████████▏ | 1365/1680 [7:38:11&lt;11:20, <text:s/>2.16s/it](25_w,50)-aCMA-ES (mu_w=14.0,w_1=14%) in dimension 30 (seed=1002295, Tue Jun <text:s/>3 11:09:08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6: <text:s/>81%|████████▏ | 1366/1680 [7:38:13&lt;10:29, <text:s/>2.00s/it]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(25_w,50)-aCMA-ES (mu_w=14.0,w_1=14%) in dimension 30 (seed=1011041, Tue Jun <text:s/>3 11:09:10 2025)</text:p>
      <text:p text:style-name="Standard">Batch Testing Optimizer CMAES with Problem Batch 12, Run 7: <text:s/>81%|████████▏ | 1367/1680 [7:38:14&lt;09:47, <text:s/>1.88s/it](25_w,50)-aCMA-ES (mu_w=14.0,w_1=14%) in dimension 30 (seed=1030314, Tue Jun <text:s/>3 11:09:1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8: <text:s/>81%|████████▏ | 1368/1680 [7:38:16&lt;09:20, <text:s/>1.80s/it](25_w,50)-aCMA-ES (mu_w=14.0,w_1=14%) in dimension 30 (seed=1051677, Tue Jun <text:s/>3 11:09:1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9: <text:s/>81%|████████▏ | 1369/1680 [7:38:17&lt;08:59, <text:s/>1.74s/it](25_w,50)-aCMA-ES (mu_w=14.0,w_1=14%) in dimension 30 (seed=1012229, Tue Jun <text:s/>3 11:09:1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0: <text:s/>82%|████████▏ | 1370/1680 [7:38:19&lt;08:46, <text:s/>1.70s/it](25_w,50)-aCMA-ES (mu_w=14.0,w_1=14%) in dimension 30 (seed=1002281, Tue Jun <text:s/>3 11:09:1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1: <text:s/>82%|████████▏ | 1371/1680 [7:38:20&lt;08:35, <text:s/>1.67s/it]/home/lin_eclipse/anaconda3/envs/metaevobox_env/lib/python3.11/site-packages/metaevobox/environment/problem/SOO/UAV/uav_numpy.py:229: RuntimeWarning: invalid value encountered in divide</text:p>
      <text:p text:style-name="Standard">(25_w,50)-aCMA-ES (mu_w=14.0,w_1=14%) in dimension 30 (seed=1051509, Tue Jun <text:s/>3 11:09:18 2025)</text:p>
      <text:p text:style-name="Standard"><text:s text:c="2"/>np.abs(np.cross((b - a), (x - a), axis = 0)) / d_ab, <text:s/># Perpendicular distance</text:p>
      <text:p text:style-name="Standard"><text:soft-page-break/>Batch Testing Optimizer CMAES with Problem Batch 12, Run 12: <text:s/>82%|████████▏ | 1372/1680 [7:38:22&lt;08:27, <text:s/>1.65s/it](25_w,50)-aCMA-ES (mu_w=14.0,w_1=14%) in dimension 30 (seed=1113893, Tue Jun <text:s/>3 11:09:1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3: <text:s/>82%|████████▏ | 1373/1680 [7:38:24&lt;08:21, <text:s/>1.63s/it](25_w,50)-aCMA-ES (mu_w=14.0,w_1=14%) in dimension 30 (seed=1013718, Tue Jun <text:s/>3 11:09:21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4: <text:s/>82%|████████▏ | 1374/1680 [7:38:25&lt;08:16, <text:s/>1.62s/it](25_w,50)-aCMA-ES (mu_w=14.0,w_1=14%) in dimension 30 (seed=976420, Tue Jun <text:s/>3 11:09:23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5: <text:s/>82%|████████▏ | 1375/1680 [7:38:27&lt;08:12, <text:s/>1.62s/it](25_w,50)-aCMA-ES (mu_w=14.0,w_1=14%) in dimension 30 (seed=1063434, Tue Jun <text:s/>3 11:09:2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6: <text:s/>82%|████████▏ | 1376/1680 [7:38:28&lt;08:08, <text:s/>1.61s/it](25_w,50)-aCMA-ES (mu_w=14.0,w_1=14%) in dimension 30 (seed=1004595, Tue Jun <text:s/>3 11:09:2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7: <text:s/>82%|████████▏ | 1377/1680 [7:38:30&lt;08:06, <text:s/>1.61s/it](25_w,50)-aCMA-ES (mu_w=14.0,w_1=14%) in dimension 30 (seed=1029569, Tue Jun <text:s/>3 11:09:27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8: <text:s/>82%|████████▏ | 1378/1680 [7:38:32&lt;08:04, <text:s/>1.60s/it](25_w,50)-aCMA-ES (mu_w=14.0,w_1=14%) in dimension 30 (seed=1063869, Tue Jun <text:s/>3 11:09:2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2, Run 19: <text:s/>82%|████████▏ | 1379/1680 [7:38:33&lt;08:03, <text:s/>1.61s/it](25_w,50)-aCMA-ES (mu_w=14.0,w_1=14%) in dimension 30 (seed=985614, Tue Jun <text:s/>3 11:09:31 2025)</text:p>
      <text:p text:style-name="Standard"><text:soft-page-break/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0: <text:s/>82%|████████▏ | 1380/1680 [7:38:35&lt;07:33, <text:s/>1.51s/it] (25_w,50)-aCMA-ES (mu_w=14.0,w_1=14%) in dimension 30 (seed=1008443, Tue Jun <text:s/>3 11:09:32 2025)</text:p>
      <text:p text:style-name="Standard">Batch Testing Optimizer CMAES with Problem Batch 13, Run 1: <text:s/>82%|████████▏ | 1381/1680 [7:38:36&lt;06:38, <text:s/>1.33s/it](25_w,50)-aCMA-ES (mu_w=14.0,w_1=14%) in dimension 30 (seed=976619, Tue Jun <text:s/>3 11:09:33 2025)</text:p>
      <text:p text:style-name="Standard">Batch Testing Optimizer CMAES with Problem Batch 13, Run 2: <text:s/>82%|████████▏ | 1382/1680 [7:38:36&lt;05:57, <text:s/>1.20s/it](25_w,50)-aCMA-ES (mu_w=14.0,w_1=14%) in dimension 30 (seed=1010712, Tue Jun <text:s/>3 11:09:3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3: <text:s/>82%|████████▏ | 1383/1680 [7:38:37&lt;05:28, <text:s/>1.11s/it](25_w,50)-aCMA-ES (mu_w=14.0,w_1=14%) in dimension 30 (seed=962268, Tue Jun <text:s/>3 11:09:35 2025)</text:p>
      <text:p text:style-name="Standard">(25_w,50)-aCMA-ES (mu_w=14.0,w_1=14%) in dimension 30 (seed=1013524, Tue Jun <text:s/>3 11:09:36 2025)</text:p>
      <text:p text:style-name="Standard">Batch Testing Optimizer CMAES with Problem Batch 13, Run 5: <text:s/>82%|████████▏ | 1385/1680 [7:38:39&lt;04:51, <text:s/>1.01it/s](25_w,50)-aCMA-ES (mu_w=14.0,w_1=14%) in dimension 30 (seed=1062266, Tue Jun <text:s/>3 11:09:3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6: <text:s/>82%|████████▎ | 1386/1680 [7:38:40&lt;04:39, <text:s/>1.05it/s](25_w,50)-aCMA-ES (mu_w=14.0,w_1=14%) in dimension 30 (seed=1003776, Tue Jun <text:s/>3 11:09:37 2025)</text:p>
      <text:p text:style-name="Standard">Batch Testing Optimizer CMAES with Problem Batch 13, Run 7: <text:s/>83%|████████▎ | 1387/1680 [7:38:41&lt;04:31, <text:s/>1.08it/s](25_w,50)-aCMA-ES (mu_w=14.0,w_1=14%) in dimension 30 (seed=1055667, Tue Jun <text:s/>3 11:09:38 2025)</text:p>
      <text:p text:style-name="Standard">Batch Testing Optimizer CMAES with Problem Batch 13, Run 8: <text:s/>83%|████████▎ | 1388/1680 [7:38:42&lt;04:23, <text:s/>1.11it/s](25_w,50)-aCMA-ES (mu_w=14.0,w_1=14%) in dimension 30 (seed=1011835, Tue Jun <text:s/>3 11:09:39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9: <text:s/>83%|████████▎ | 1389/1680 [7:38:42&lt;04:08, <text:s/>1.17it/s](25_w,50)-aCMA-ES (mu_w=14.0,w_1=14%) in dimension 30 (seed=965768, Tue Jun <text:s/>3 11:09:40 2025)</text:p>
      <text:p text:style-name="Standard">Batch Testing Optimizer CMAES with Problem Batch 13, Run 10: <text:s/>83%|████████▎ | 1390/1680 [7:38:43&lt;03:51, <text:s/>1.25it/s](25_w,50)-aCMA-ES (mu_w=14.0,w_1=14%) in dimension 30 (seed=1087480, Tue Jun <text:s/>3 11:09:40 2025)</text:p>
      <text:p text:style-name="Standard">Batch Testing Optimizer CMAES with Problem Batch 13, Run 11: <text:s/>83%|████████▎ | 1391/1680 [7:38:44&lt;03:38, <text:s/>1.32it/s](25_w,50)-aCMA-ES (mu_w=14.0,w_1=14%) in dimension 30 (seed=987529, Tue Jun <text:s/>3 11:09:41 2025)</text:p>
      <text:p text:style-name="Standard"><text:soft-page-break/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12: <text:s/>83%|████████▎ | 1392/1680 [7:38:44&lt;03:29, <text:s/>1.37it/s](25_w,50)-aCMA-ES (mu_w=14.0,w_1=14%) in dimension 30 (seed=985514, Tue Jun <text:s/>3 11:09:4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13: <text:s/>83%|████████▎ | 1393/1680 [7:38:45&lt;03:23, <text:s/>1.41it/s](25_w,50)-aCMA-ES (mu_w=14.0,w_1=14%) in dimension 30 (seed=1077829, Tue Jun <text:s/>3 11:09:42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14: <text:s/>83%|████████▎ | 1394/1680 [7:38:46&lt;03:18, <text:s/>1.44it/s](25_w,50)-aCMA-ES (mu_w=14.0,w_1=14%) in dimension 30 (seed=1023848, Tue Jun <text:s/>3 11:09:43 2025)</text:p>
      <text:p text:style-name="Standard">Batch Testing Optimizer CMAES with Problem Batch 13, Run 15: <text:s/>83%|████████▎ | 1395/1680 [7:38:46&lt;03:14, <text:s/>1.47it/s](25_w,50)-aCMA-ES (mu_w=14.0,w_1=14%) in dimension 30 (seed=939908, Tue Jun <text:s/>3 11:09:44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16: <text:s/>83%|████████▎ | 1396/1680 [7:38:47&lt;03:11, <text:s/>1.48it/s](25_w,50)-aCMA-ES (mu_w=14.0,w_1=14%) in dimension 30 (seed=1097574, Tue Jun <text:s/>3 11:09:44 2025)</text:p>
      <text:p text:style-name="Standard">Batch Testing Optimizer CMAES with Problem Batch 13, Run 17: <text:s/>83%|████████▎ | 1397/1680 [7:38:48&lt;03:09, <text:s/>1.49it/s](25_w,50)-aCMA-ES (mu_w=14.0,w_1=14%) in dimension 30 (seed=1066183, Tue Jun <text:s/>3 11:09:45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18: <text:s/>83%|████████▎ | 1398/1680 [7:38:48&lt;03:07, <text:s/>1.50it/s](25_w,50)-aCMA-ES (mu_w=14.0,w_1=14%) in dimension 30 (seed=1020562, Tue Jun <text:s/>3 11:09:46 2025)</text:p>
      <text:p text:style-name="Standard">/home/lin_eclipse/anaconda3/envs/metaevobox_env/lib/python3.11/site-packages/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CMAES with Problem Batch 13, Run 19: <text:s/>83%|████████▎ | 1399/1680 [7:38:49&lt;03:08, <text:s/>1.49it/s](25_w,50)-aCMA-ES (mu_w=14.0,w_1=14%) in dimension 30 (seed=1029244, Tue Jun <text:s/>3 11:09:46 2025)</text:p>
      <text:p text:style-name="Standard">Batch Testing Optimizer Random_search with Problem Batch 0, Run 0: <text:s/>83%|████████▎ | 1400/1680 [7:38:50&lt;04:01, <text:s/>1.16it/s]/home/lin_eclipse/anaconda3/envs/metaevobox_env/lib/python3.11/site-packages/<text:soft-page-break/>metaevobox/environment/problem/SOO/UAV/uav_numpy.py:229: RuntimeWarning: invalid value encountered in divide</text:p>
      <text:p text:style-name="Standard"><text:s text:c="2"/>np.abs(np.cross((b - a), (x - a), axis = 0)) / d_ab, <text:s/># Perpendicular distance</text:p>
      <text:p text:style-name="Standard">Batch Testing Optimizer Random_search with Problem Batch 13, Run 19: 100%|██████████| 1680/1680 [7:40:19&lt;00:00, <text:s/>1.95it/s]/home/lin_eclipse/anaconda3/envs/metaevobox_env/lib/python3.11/site-packages/metaevobox/logger.py:343: FutureWarning: Setting an item of incompatible dtype is deprecated and will raise an error in a future version of pandas. Value '3.509e+4(4.331e+3)' has dtype incompatible with float64, please explicitly cast to a compatible dtype first.</text:p>
      <text:p text:style-name="Standard">Post processing &amp; drawing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408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6e+3(6.779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2.656e+4(2.284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-0.026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5e+3(5.850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1.738e+4(6.326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019' has dtype incompatible with float64, please explicitly cast to a compatible dtype first.</text:p>
      <text:p text:style-name="Standard"><text:soft-page-break/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6e+3(6.491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3.73e+4(2.761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623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6e+3(5.885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3.156e+4(4.987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198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7e+3(6.004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3.141e+4(5.186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<text:soft-page-break/>/home/lin_eclipse/anaconda3/envs/metaevobox_env/lib/python3.11/site-packages/metaevobox/logger.py:345: FutureWarning: Setting an item of incompatible dtype is deprecated and will raise an error in a future version of pandas. Value '-0.740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8e+3(6.247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2.007e+4(7.461e+2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079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7e+3(6.576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2.801e+4(3.547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016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6e+3(6.045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3.403e+4(7.192e+3)' has dtype incompatible with float64, please explicitly cast to a compatible dtype first.</text:p>
      <text:p text:style-name="Standard"><text:soft-page-break/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346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6e+3(5.766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3.247e+4(3.504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-0.365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8e+3(6.347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3.398e+4(5.940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0.433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8e+3(6.913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<text:soft-page-break/>/home/lin_eclipse/anaconda3/envs/metaevobox_env/lib/python3.11/site-packages/metaevobox/logger.py:343: FutureWarning: Setting an item of incompatible dtype is deprecated and will raise an error in a future version of pandas. Value '9.023e+3(5.361e+2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2.837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7e+3(7.221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1.638e+4(2.028e+3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-0.167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09e+3(5.867e+0)' has dtype incompatible with float64, please explicitly cast to a compatible dtype first.</text:p>
      <text:p text:style-name="Standard"><text:s text:c="2"/>df_results.loc[optimizer, (problem, 'FEs')] = np.format_float_scientific(avg_fes, precision=3, exp_digits=1) + "(" + np.format_float_scientific(std_fes, precision=3, exp_digits=1) + ")"</text:p>
      <text:p text:style-name="Standard">/home/lin_eclipse/anaconda3/envs/metaevobox_env/lib/python3.11/site-packages/metaevobox/logger.py:343: FutureWarning: Setting an item of incompatible dtype is deprecated and will raise an error in a future version of pandas. Value '9.655e+3(3.49e+2)' has dtype incompatible with float64, please explicitly cast to a compatible dtype first.</text:p>
      <text:p text:style-name="Standard"><text:s text:c="2"/>df_results.loc[optimizer, (problem, 'Obj')] = np.format_float_scientific(avg_obj, precision=3, exp_digits=1) + "(" + np.format_float_scientific(std_obj, precision=3, exp_digits=1) + ")"</text:p>
      <text:p text:style-name="Standard">/home/lin_eclipse/anaconda3/envs/metaevobox_env/lib/python3.11/site-packages/metaevobox/logger.py:345: FutureWarning: Setting an item of incompatible dtype is deprecated and will raise an error in a future version of pandas. Value '-4.442' has dtype incompatible with float64, please explicitly cast to a compatible dtype first.</text:p>
      <text:p text:style-name="Standard"><text:s text:c="2"/>df_results.loc[optimizer, (problem, 'Gap')] = "%.3f" % (1-(rs_obj[problem]-avg_obj) / (rs_obj[problem]-cmaes_obj[problem]+1e-10))</text:p>
      <text:p text:style-name="Standard">/home/lin_eclipse/anaconda3/envs/metaevobox_env/lib/python3.11/site-packages/metaevobox/logger.py:349: FutureWarning: Setting an item of incompatible dtype is deprecated and will raise an error in a future version of pandas. Value '2.511e+3(5.413e+0)' has dtype incompatible with float64, please explicitly cast to a compatible dtype first.</text:p>
      <text:p text:style-name="Standard"><text:soft-page-break/><text:s text:c="2"/>df_results.loc[optimizer, (problem, 'FEs')] = np.format_float_scientific(avg_fes, precision=3, exp_digits=1) + "(" + np.format_float_scientific(std_fes, precision=3, exp_digits=1) + ")"</text:p>
      <text:p text:style-name="Standard">Traceback (most recent call last):</text:p>
      <text:p text:style-name="Standard"><text:s text:c="2"/>File "/home/lin_eclipse/PycharmProjects/PythonProject/MetaevoBox_EACO/test_eaco.py", line 73, in &lt;module&gt;</text:p>
      <text:p text:style-name="Standard"><text:s text:c="4"/>results = tester.test()</text:p>
      <text:p text:style-name="Standard"><text:s text:c="14"/>^^^^^^^^^^^^^</text:p>
      <text:p text:style-name="Standard"><text:s text:c="2"/>File "/home/lin_eclipse/anaconda3/envs/metaevobox_env/lib/python3.11/site-packages/metaevobox/tester.py", line 778, in test</text:p>
      <text:p text:style-name="Standard"><text:s text:c="4"/>logger.post_processing_test_statics(test_log_dir + '/') # todo</text:p>
      <text:p text:style-name="Standard"><text:s text:c="4"/>^^^^^^^^^^^^^^^^^^^^^^^^^^^^^^^^^^^^^^^^^^^^^^^^^^^^^^^</text:p>
      <text:p text:style-name="Standard"><text:s text:c="2"/>File "/home/lin_eclipse/anaconda3/envs/metaevobox_env/lib/python3.11/site-packages/metaevobox/logger.py", line 1148, in post_processing_test_statics</text:p>
      <text:p text:style-name="Standard"><text:s text:c="4"/>self.draw_test_data(results['cost'], 'cost', log_dir + 'pics/', logged=True, categorized=True, pdf_fig=pdf_fig, data_wrapper=np.array)</text:p>
      <text:p text:style-name="Standard"><text:s text:c="2"/>File "/home/lin_eclipse/anaconda3/envs/metaevobox_env/lib/python3.11/site-packages/metaevobox/logger.py", line 728, in draw_test_data</text:p>
      <text:p text:style-name="Standard"><text:s text:c="4"/>values = data_wrapper(values)</text:p>
      <text:p text:style-name="Standard"><text:s text:c="13"/>^^^^^^^^^^^^^^^^^^^^</text:p>
      <text:p text:style-name="Standard">ValueError: setting an array element with a sequence. The requested array has an inhomogeneous shape after 1 dimensions. The detected shape was (20,) + inhomogeneous part.</text:p>
      <text:p text:style-name="Standard">Batch Testing Optimizer Random_search with Problem Batch 13, Run 19: 100%|██████████| 1680/1680 [7:40:22&lt;00:00, 16.44s/it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1:28:29.128746930</meta:creation-date>
    <dc:date>2025-06-03T11:28:40.329059878</dc:date>
    <meta:editing-duration>PT11S</meta:editing-duration>
    <meta:editing-cycles>1</meta:editing-cycles>
    <meta:document-statistic meta:table-count="0" meta:image-count="0" meta:object-count="0" meta:page-count="41" meta:paragraph-count="890" meta:word-count="13980" meta:character-count="141174" meta:non-whitespace-character-count="125950"/>
    <meta:generator>LibreOffice/7.3.7.2$Linux_X86_64 LibreOffice_project/30$Build-2</meta:generator>
  </office:meta>
</office:document-meta>
</file>